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900000383ABD29334.png" manifest:media-type="image/png"/>
  <manifest:file-entry manifest:full-path="Pictures/100000010000051100000286FDA98988.png" manifest:media-type="image/png"/>
  <manifest:file-entry manifest:full-path="Pictures/100000010000049A000001D297B46102.png" manifest:media-type="image/png"/>
  <manifest:file-entry manifest:full-path="Pictures/100000010000031A000002D5642E7D4B.png" manifest:media-type="image/png"/>
  <manifest:file-entry manifest:full-path="Pictures/1000000100000552000001BA8E183157.png" manifest:media-type="image/png"/>
  <manifest:file-entry manifest:full-path="Pictures/10000001000004F7000002ED53770307.png" manifest:media-type="image/png"/>
  <manifest:file-entry manifest:full-path="Pictures/10000001000003F70000035047D046E8.png" manifest:media-type="image/png"/>
  <manifest:file-entry manifest:full-path="Pictures/1000000100000399000004AA35CE530E.png" manifest:media-type="image/png"/>
  <manifest:file-entry manifest:full-path="Pictures/10000001000002C4000001ECA84F8B58.png" manifest:media-type="image/png"/>
  <manifest:file-entry manifest:full-path="Pictures/10000001000002F5000001D57931B62E.png" manifest:media-type="image/png"/>
  <manifest:file-entry manifest:full-path="Pictures/1002AD7F00004E3D000030792384CD0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7" style:family="table">
      <style:table-properties style:width="25.797cm" fo:margin-left="0cm" table:align="left" style:may-break-between-rows="true" table:border-model="collapsing"/>
    </style:style>
    <style:style style:name="Table7.A" style:family="table-column">
      <style:table-column-properties style:column-width="3.519cm"/>
    </style:style>
    <style:style style:name="Table7.B" style:family="table-column">
      <style:table-column-properties style:column-width="2.191cm"/>
    </style:style>
    <style:style style:name="Table7.C" style:family="table-column">
      <style:table-column-properties style:column-width="2.856cm"/>
    </style:style>
    <style:style style:name="Table7.D" style:family="table-column">
      <style:table-column-properties style:column-width="3.552cm"/>
    </style:style>
    <style:style style:name="Table7.E" style:family="table-column">
      <style:table-column-properties style:column-width="6.694cm"/>
    </style:style>
    <style:style style:name="Table7.F" style:family="table-column">
      <style:table-column-properties style:column-width="2.487cm"/>
    </style:style>
    <style:style style:name="Table7.G" style:family="table-column">
      <style:table-column-properties style:column-width="2.699cm"/>
    </style:style>
    <style:style style:name="Table7.H" style:family="table-column">
      <style:table-column-properties style:column-width="1.799cm"/>
    </style:style>
    <style:style style:name="Table7.1" style:family="table-row">
      <style:table-row-properties fo:keep-together="auto"/>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25.797cm" fo:margin-left="0cm" table:align="left" style:may-break-between-rows="true" table:border-model="collapsing"/>
    </style:style>
    <style:style style:name="Table8.A" style:family="table-column">
      <style:table-column-properties style:column-width="3.519cm"/>
    </style:style>
    <style:style style:name="Table8.B" style:family="table-column">
      <style:table-column-properties style:column-width="2.191cm"/>
    </style:style>
    <style:style style:name="Table8.C" style:family="table-column">
      <style:table-column-properties style:column-width="2.856cm"/>
    </style:style>
    <style:style style:name="Table8.D" style:family="table-column">
      <style:table-column-properties style:column-width="3.552cm"/>
    </style:style>
    <style:style style:name="Table8.E" style:family="table-column">
      <style:table-column-properties style:column-width="6.694cm"/>
    </style:style>
    <style:style style:name="Table8.F" style:family="table-column">
      <style:table-column-properties style:column-width="2.487cm"/>
    </style:style>
    <style:style style:name="Table8.G" style:family="table-column">
      <style:table-column-properties style:column-width="2.699cm"/>
    </style:style>
    <style:style style:name="Table8.H" style:family="table-column">
      <style:table-column-properties style:column-width="1.799cm"/>
    </style:style>
    <style:style style:name="Table8.1" style:family="table-row">
      <style:table-row-properties fo:keep-together="auto"/>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H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25.797cm" fo:margin-left="0cm" table:align="left" style:may-break-between-rows="true" table:border-model="collapsing"/>
    </style:style>
    <style:style style:name="Table9.A" style:family="table-column">
      <style:table-column-properties style:column-width="3.519cm"/>
    </style:style>
    <style:style style:name="Table9.B" style:family="table-column">
      <style:table-column-properties style:column-width="2.191cm"/>
    </style:style>
    <style:style style:name="Table9.C" style:family="table-column">
      <style:table-column-properties style:column-width="2.856cm"/>
    </style:style>
    <style:style style:name="Table9.D" style:family="table-column">
      <style:table-column-properties style:column-width="3.738cm"/>
    </style:style>
    <style:style style:name="Table9.E" style:family="table-column">
      <style:table-column-properties style:column-width="6.509cm"/>
    </style:style>
    <style:style style:name="Table9.F" style:family="table-column">
      <style:table-column-properties style:column-width="2.487cm"/>
    </style:style>
    <style:style style:name="Table9.G" style:family="table-column">
      <style:table-column-properties style:column-width="2.699cm"/>
    </style:style>
    <style:style style:name="Table9.H" style:family="table-column">
      <style:table-column-properties style:column-width="1.799cm"/>
    </style:style>
    <style:style style:name="Table9.1" style:family="table-row">
      <style:table-row-properties fo:keep-together="auto"/>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11" style:family="table-row">
      <style:table-row-properties style:min-row-height="0.621cm" fo:keep-together="auto"/>
    </style:style>
    <style:style style:name="Table4" style:family="table">
      <style:table-properties style:width="17cm" table:align="margins"/>
    </style:style>
    <style:style style:name="Table4.A" style:family="table-column">
      <style:table-column-properties style:column-width="3.399cm" style:rel-column-width="13102*"/>
    </style:style>
    <style:style style:name="Table4.B" style:family="table-column">
      <style:table-column-properties style:column-width="3.401cm" style:rel-column-width="13109*"/>
    </style:style>
    <style:style style:name="Table4.C" style:family="table-column">
      <style:table-column-properties style:column-width="2.484cm" style:rel-column-width="9573*"/>
    </style:style>
    <style:style style:name="Table4.D" style:family="table-column">
      <style:table-column-properties style:column-width="4.316cm" style:rel-column-width="16638*"/>
    </style:style>
    <style:style style:name="Table4.E" style:family="table-column">
      <style:table-column-properties style:column-width="3.401cm" style:rel-column-width="13113*"/>
    </style:style>
    <style:style style:name="Table4.1" style:family="table-row">
      <style:table-row-properties style:min-row-height="0.794cm"/>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1.588cm" style:rel-column-width="6119*"/>
    </style:style>
    <style:style style:name="Table5.B" style:family="table-column">
      <style:table-column-properties style:column-width="15.413cm" style:rel-column-width="59416*"/>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8" style:family="table-row">
      <style:table-row-properties fo:keep-together="auto"/>
    </style:style>
    <style:style style:name="Table6" style:family="table">
      <style:table-properties style:width="17cm" table:align="margins"/>
    </style:style>
    <style:style style:name="Table6.A" style:family="table-column">
      <style:table-column-properties style:column-width="1.39cm" style:rel-column-width="5358*"/>
    </style:style>
    <style:style style:name="Table6.B" style:family="table-column">
      <style:table-column-properties style:column-width="15.61cm" style:rel-column-width="60177*"/>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fo:keep-with-next="alway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397cm"/>
    </style:style>
    <style:style style:name="Table2.A1" style:family="table-cell">
      <style:table-cell-properties fo:padding="0.097cm" fo:border="none" style:writing-mode="page"/>
    </style:style>
    <style:style style:name="Table2.B1" style:family="table-cell">
      <style:table-cell-properties fo:padding="0cm" fo:border="none" style:writing-mode="page"/>
    </style:style>
    <style:style style:name="Table1" style:family="table">
      <style:table-properties style:width="7.784cm" fo:margin-left="0.332cm" table:align="left" style:may-break-between-rows="true" table:border-model="collapsing"/>
    </style:style>
    <style:style style:name="Table1.A" style:family="table-column">
      <style:table-column-properties style:column-width="2.293cm"/>
    </style:style>
    <style:style style:name="Table1.B" style:family="table-column">
      <style:table-column-properties style:column-width="2.999cm"/>
    </style:style>
    <style:style style:name="Table1.C" style:family="table-column">
      <style:table-column-properties style:column-width="2.492cm"/>
    </style:style>
    <style:style style:name="Table1.A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61cm" fo:keep-together="auto"/>
    </style:style>
    <style:style style:name="Table3" style:family="table">
      <style:table-properties style:width="7.784cm" fo:margin-left="0.332cm" table:align="left" style:may-break-between-rows="true" table:border-model="collapsing"/>
    </style:style>
    <style:style style:name="Table3.A" style:family="table-column">
      <style:table-column-properties style:column-width="2.293cm"/>
    </style:style>
    <style:style style:name="Table3.B" style:family="table-column">
      <style:table-column-properties style:column-width="2.999cm"/>
    </style:style>
    <style:style style:name="Table3.C" style:family="table-column">
      <style:table-column-properties style:column-width="2.492cm"/>
    </style:style>
    <style:style style:name="Table3.A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row">
      <style:table-row-properties style:min-row-height="0.61cm" fo:keep-together="auto"/>
    </style:style>
    <style:style style:name="Table10" style:family="table">
      <style:table-properties style:width="11.218cm" fo:margin-left="2.762cm" table:align="left"/>
    </style:style>
    <style:style style:name="Table10.A" style:family="table-column">
      <style:table-column-properties style:column-width="4.419cm"/>
    </style:style>
    <style:style style:name="Table10.B" style:family="table-column">
      <style:table-column-properties style:column-width="6.8cm"/>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97cm" fo:border="0.5pt solid #000000" style:writing-mode="page">
        <style:background-image/>
      </style:table-cell-properties>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fo:language="en" fo:country="AU" officeooo:rsid="0013468b" officeooo:paragraph-rsid="0013468b"/>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Heading_20_1" style:list-style-name="">
      <style:text-properties fo:language="en" fo:country="AU" officeooo:rsid="00107a28" officeooo:paragraph-rsid="00107a28"/>
    </style:style>
    <style:style style:name="P8" style:family="paragraph" style:parent-style-name="Heading_20_1">
      <style:paragraph-properties fo:break-before="page"/>
      <style:text-properties fo:language="en" fo:country="AU" officeooo:rsid="00107a28" officeooo:paragraph-rsid="00107a28"/>
    </style:style>
    <style:style style:name="P9" style:family="paragraph" style:parent-style-name="Text_20_body">
      <style:text-properties fo:language="en" fo:country="AU" officeooo:rsid="00107a28" officeooo:paragraph-rsid="00107a28"/>
    </style:style>
    <style:style style:name="P10" style:family="paragraph" style:parent-style-name="Text_20_body">
      <style:text-properties fo:language="en" fo:country="AU" officeooo:rsid="00107a28" officeooo:paragraph-rsid="0013468b"/>
    </style:style>
    <style:style style:name="P11" style:family="paragraph" style:parent-style-name="Heading_20_2">
      <style:text-properties fo:language="en" fo:country="AU" officeooo:rsid="00123dae" officeooo:paragraph-rsid="00123dae"/>
    </style:style>
    <style:style style:name="P12" style:family="paragraph" style:parent-style-name="Text_20_body" style:list-style-name="L1">
      <style:text-properties fo:language="en" fo:country="AU" officeooo:rsid="00123dae" officeooo:paragraph-rsid="00123dae"/>
    </style:style>
    <style:style style:name="P13" style:family="paragraph" style:parent-style-name="Text_20_body" style:list-style-name="L1">
      <style:text-properties fo:language="en" fo:country="AU" officeooo:rsid="00123dae" officeooo:paragraph-rsid="005aacaa"/>
    </style:style>
    <style:style style:name="P14" style:family="paragraph" style:parent-style-name="Text_20_body" style:list-style-name="L1">
      <style:text-properties fo:language="en" fo:country="AU" officeooo:rsid="00123dae" officeooo:paragraph-rsid="0013470d"/>
    </style:style>
    <style:style style:name="P15" style:family="paragraph" style:parent-style-name="Heading_20_2">
      <style:text-properties fo:language="en" fo:country="AU" officeooo:rsid="0013468b" officeooo:paragraph-rsid="0013468b"/>
    </style:style>
    <style:style style:name="P16" style:family="paragraph" style:parent-style-name="Text_20_body">
      <style:text-properties fo:language="en" fo:country="AU" officeooo:rsid="0013468b" officeooo:paragraph-rsid="0016bd00"/>
    </style:style>
    <style:style style:name="P17" style:family="paragraph" style:parent-style-name="Text_20_body" style:list-style-name="L2">
      <style:text-properties fo:language="en" fo:country="AU" officeooo:rsid="0013468b" officeooo:paragraph-rsid="0013468b"/>
    </style:style>
    <style:style style:name="P18" style:family="paragraph" style:parent-style-name="Text_20_body">
      <style:text-properties fo:language="en" fo:country="AU" officeooo:rsid="0013470d" officeooo:paragraph-rsid="0013470d"/>
    </style:style>
    <style:style style:name="P19" style:family="paragraph" style:parent-style-name="Text_20_body" style:list-style-name="L3">
      <style:text-properties fo:language="en" fo:country="AU" officeooo:rsid="0013470d" officeooo:paragraph-rsid="0013470d"/>
    </style:style>
    <style:style style:name="P20" style:family="paragraph" style:parent-style-name="Text_20_body">
      <style:text-properties officeooo:rsid="0013470d" officeooo:paragraph-rsid="0013470d"/>
    </style:style>
    <style:style style:name="P21" style:family="paragraph" style:parent-style-name="Text_20_body">
      <style:text-properties officeooo:rsid="0013470d" officeooo:paragraph-rsid="00139efc"/>
    </style:style>
    <style:style style:name="P22" style:family="paragraph" style:parent-style-name="Text_20_body" style:list-style-name="L3">
      <style:text-properties fo:language="en" fo:country="AU" officeooo:rsid="00139efc" officeooo:paragraph-rsid="00139efc"/>
    </style:style>
    <style:style style:name="P23" style:family="paragraph" style:parent-style-name="Heading_20_2" style:master-page-name="Landscape">
      <style:paragraph-properties style:page-number="auto"/>
      <style:text-properties officeooo:rsid="0055e73f" officeooo:paragraph-rsid="0055e73f"/>
    </style:style>
    <style:style style:name="P24" style:family="paragraph" style:parent-style-name="Text_20_body">
      <style:text-properties officeooo:rsid="0055e73f" officeooo:paragraph-rsid="0055e73f"/>
    </style:style>
    <style:style style:name="P25" style:family="paragraph" style:parent-style-name="Heading_20_3">
      <style:text-properties officeooo:rsid="0055e73f" officeooo:paragraph-rsid="0055e73f"/>
    </style:style>
    <style:style style:name="P2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378e3" officeooo:paragraph-rsid="005378e3"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2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378e3"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28"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39efc" officeooo:paragraph-rsid="00139ef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30"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139ef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4b4b7" officeooo:paragraph-rsid="0054b4b7"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3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5e73f" officeooo:paragraph-rsid="0055e73f"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3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48fe0" officeooo:paragraph-rsid="00148fe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5e73f"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35"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148fe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55e73f" officeooo:paragraph-rsid="005c8f2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Heading_20_2" style:list-style-name="">
      <style:text-properties fo:language="en" fo:country="AU" officeooo:paragraph-rsid="00123dae"/>
    </style:style>
    <style:style style:name="P39" style:family="paragraph" style:parent-style-name="Heading_20_3">
      <style:paragraph-properties fo:break-before="page"/>
      <style:text-properties officeooo:paragraph-rsid="0055e73f"/>
    </style:style>
    <style:style style:name="P40"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378e3" officeooo:paragraph-rsid="0055e73f"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41"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83614"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4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6157a" officeooo:paragraph-rsid="0016157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6157a" officeooo:paragraph-rsid="00187be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83614" officeooo:paragraph-rsid="00583614"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45" style:family="paragraph" style:parent-style-name="Table_20_Contents">
      <style:paragraph-properties fo:text-align="left" style:justify-single-word="false"/>
      <style:text-properties fo:language="en" fo:country="AU" officeooo:paragraph-rsid="00187be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7cf74"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47" style:family="paragraph" style:parent-style-name="Standard">
      <style:text-properties officeooo:paragraph-rsid="0055e73f"/>
    </style:style>
    <style:style style:name="P48" style:family="paragraph" style:parent-style-name="Heading_20_3">
      <style:text-properties officeooo:rsid="00583614" officeooo:paragraph-rsid="00583614"/>
    </style:style>
    <style:style style:name="P49"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378e3" officeooo:paragraph-rsid="00583614"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50"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6157a" officeooo:paragraph-rsid="0058361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83614"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583614" officeooo:paragraph-rsid="0058361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87bee" officeooo:paragraph-rsid="00187be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96b7b"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55"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596b7b" officeooo:paragraph-rsid="00596b7b"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96b7b" officeooo:paragraph-rsid="00596b7b"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5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48fe0" officeooo:paragraph-rsid="00148fe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99a41" officeooo:paragraph-rsid="00199a4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text-properties officeooo:paragraph-rsid="00583614"/>
    </style:style>
    <style:style style:name="P60" style:family="paragraph" style:parent-style-name="Heading_20_1" style:master-page-name="Standard">
      <style:paragraph-properties style:page-number="auto" fo:break-before="page"/>
      <style:text-properties fo:language="en" fo:country="AU" officeooo:rsid="00107a28" officeooo:paragraph-rsid="005aacaa"/>
    </style:style>
    <style:style style:name="P61" style:family="paragraph" style:parent-style-name="Heading_20_2">
      <style:text-properties officeooo:rsid="00212192" officeooo:paragraph-rsid="00212192"/>
    </style:style>
    <style:style style:name="P62" style:family="paragraph" style:parent-style-name="Text_20_body">
      <style:text-properties officeooo:rsid="00212192" officeooo:paragraph-rsid="00212192"/>
    </style:style>
    <style:style style:name="P63" style:family="paragraph" style:parent-style-name="Text_20_body">
      <style:text-properties officeooo:paragraph-rsid="00212192"/>
    </style:style>
    <style:style style:name="P64" style:family="paragraph" style:parent-style-name="Text_20_body">
      <style:text-properties officeooo:rsid="002d5f2f" officeooo:paragraph-rsid="002d5f2f"/>
    </style:style>
    <style:style style:name="P65" style:family="paragraph" style:parent-style-name="Heading_20_2">
      <style:text-properties officeooo:rsid="0022937d" officeooo:paragraph-rsid="0022937d"/>
    </style:style>
    <style:style style:name="P66" style:family="paragraph" style:parent-style-name="Text_20_body">
      <style:text-properties officeooo:rsid="0022937d" officeooo:paragraph-rsid="0022937d"/>
    </style:style>
    <style:style style:name="P67" style:family="paragraph" style:parent-style-name="Text_20_body" style:list-style-name="L4">
      <style:text-properties officeooo:rsid="0022937d" officeooo:paragraph-rsid="0022937d"/>
    </style:style>
    <style:style style:name="P68" style:family="paragraph" style:parent-style-name="Text_20_body">
      <style:text-properties officeooo:rsid="0023fc48" officeooo:paragraph-rsid="0023fc48"/>
    </style:style>
    <style:style style:name="P69" style:family="paragraph" style:parent-style-name="Heading_20_2">
      <style:paragraph-properties fo:break-before="page"/>
      <style:text-properties officeooo:rsid="0023fc48" officeooo:paragraph-rsid="0023fc48"/>
    </style:style>
    <style:style style:name="P70" style:family="paragraph" style:parent-style-name="Text_20_body">
      <style:text-properties officeooo:rsid="002a519a" officeooo:paragraph-rsid="002a519a"/>
    </style:style>
    <style:style style:name="P71" style:family="paragraph" style:parent-style-name="Heading_20_2">
      <style:text-properties officeooo:rsid="002a519a" officeooo:paragraph-rsid="002a519a"/>
    </style:style>
    <style:style style:name="P72" style:family="paragraph" style:parent-style-name="Text_20_body" style:list-style-name="L5">
      <style:text-properties style:text-underline-style="none" officeooo:rsid="002a519a" officeooo:paragraph-rsid="002a519a"/>
    </style:style>
    <style:style style:name="P73" style:family="paragraph" style:parent-style-name="Text_20_body" style:list-style-name="L5">
      <style:text-properties style:text-underline-style="none" officeooo:rsid="002b65b4" officeooo:paragraph-rsid="002b65b4"/>
    </style:style>
    <style:style style:name="P74" style:family="paragraph" style:parent-style-name="Heading_20_1">
      <style:paragraph-properties fo:break-before="page"/>
      <style:text-properties officeooo:rsid="00315daa" officeooo:paragraph-rsid="00315daa"/>
    </style:style>
    <style:style style:name="P75" style:family="paragraph" style:parent-style-name="Text_20_body">
      <style:text-properties fo:font-weight="bold" officeooo:rsid="00315daa" officeooo:paragraph-rsid="00315daa" style:font-weight-asian="bold" style:font-weight-complex="bold"/>
    </style:style>
    <style:style style:name="P76" style:family="paragraph" style:parent-style-name="Heading_20_2">
      <style:text-properties officeooo:rsid="003291f5" officeooo:paragraph-rsid="003291f5"/>
    </style:style>
    <style:style style:name="P77" style:family="paragraph" style:parent-style-name="Text_20_body">
      <style:text-properties officeooo:rsid="00329e48" officeooo:paragraph-rsid="00329e48"/>
    </style:style>
    <style:style style:name="P78" style:family="paragraph" style:parent-style-name="Text_20_body">
      <style:text-properties officeooo:rsid="0034f69f" officeooo:paragraph-rsid="0034f69f"/>
    </style:style>
    <style:style style:name="P79" style:family="paragraph" style:parent-style-name="Text_20_body" style:list-style-name="L6">
      <style:text-properties officeooo:rsid="00331440" officeooo:paragraph-rsid="00331440"/>
    </style:style>
    <style:style style:name="P80" style:family="paragraph" style:parent-style-name="Text_20_body" style:list-style-name="L6">
      <style:text-properties officeooo:rsid="0034f69f" officeooo:paragraph-rsid="0034f69f"/>
    </style:style>
    <style:style style:name="P81" style:family="paragraph" style:parent-style-name="Text_20_body">
      <style:text-properties officeooo:paragraph-rsid="003291f5"/>
    </style:style>
    <style:style style:name="P82" style:family="paragraph" style:parent-style-name="Text_20_body">
      <style:text-properties officeooo:rsid="003291f5" officeooo:paragraph-rsid="003291f5"/>
    </style:style>
    <style:style style:name="P83" style:family="paragraph" style:parent-style-name="Heading_20_2">
      <style:paragraph-properties fo:break-before="page"/>
      <style:text-properties officeooo:paragraph-rsid="00387e9a"/>
    </style:style>
    <style:style style:name="P84" style:family="paragraph" style:parent-style-name="Heading_20_3">
      <style:text-properties officeooo:rsid="0041c288" officeooo:paragraph-rsid="0041c288"/>
    </style:style>
    <style:style style:name="P85" style:family="paragraph" style:parent-style-name="Text_20_body">
      <style:text-properties officeooo:rsid="0041c288" officeooo:paragraph-rsid="0041c288"/>
    </style:style>
    <style:style style:name="P86" style:family="paragraph" style:parent-style-name="Text_20_body">
      <style:text-properties officeooo:rsid="00429e98" officeooo:paragraph-rsid="00429e98"/>
    </style:style>
    <style:style style:name="P87" style:family="paragraph" style:parent-style-name="Heading_20_3">
      <style:text-properties officeooo:rsid="00429e98" officeooo:paragraph-rsid="00429e98"/>
    </style:style>
    <style:style style:name="P88" style:family="paragraph" style:parent-style-name="Text_20_body">
      <style:text-properties fo:font-weight="bold" officeooo:rsid="0044134c" officeooo:paragraph-rsid="0044134c" style:font-weight-asian="bold" style:font-weight-complex="bold"/>
    </style:style>
    <style:style style:name="P89" style:family="paragraph" style:parent-style-name="Text_20_body">
      <style:text-properties officeooo:rsid="0042e1d2" officeooo:paragraph-rsid="0042e1d2"/>
    </style:style>
    <style:style style:name="P90" style:family="paragraph" style:parent-style-name="Text_20_body" style:list-style-name="L7">
      <style:text-properties officeooo:rsid="0042e1d2" officeooo:paragraph-rsid="0042e1d2"/>
    </style:style>
    <style:style style:name="P91" style:family="paragraph" style:parent-style-name="Text_20_body">
      <style:text-properties officeooo:rsid="0044134c" officeooo:paragraph-rsid="0044134c"/>
    </style:style>
    <style:style style:name="P9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44134c" officeooo:paragraph-rsid="0044134c"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officeooo:rsid="004421e6" officeooo:paragraph-rsid="004421e6"/>
    </style:style>
    <style:style style:name="P9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4484fc" officeooo:paragraph-rsid="004484f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officeooo:rsid="004484fc" officeooo:paragraph-rsid="004484fc"/>
    </style:style>
    <style:style style:name="P96" style:family="paragraph" style:parent-style-name="Text_20_body">
      <style:text-properties fo:font-weight="bold" officeooo:rsid="0044f15a" officeooo:paragraph-rsid="0044f15a" style:font-weight-asian="bold" style:font-weight-complex="bold"/>
    </style:style>
    <style:style style:name="P9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44f15a" officeooo:paragraph-rsid="0044f15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Heading_20_4">
      <style:text-properties officeooo:rsid="0044f15a" officeooo:paragraph-rsid="0044f15a"/>
    </style:style>
    <style:style style:name="P99" style:family="paragraph" style:parent-style-name="Heading_20_4">
      <style:paragraph-properties fo:break-before="page"/>
      <style:text-properties officeooo:rsid="0044f15a" officeooo:paragraph-rsid="0044f15a"/>
    </style:style>
    <style:style style:name="P100" style:family="paragraph" style:parent-style-name="Text_20_body">
      <style:text-properties officeooo:rsid="0044f15a" officeooo:paragraph-rsid="0044f15a"/>
    </style:style>
    <style:style style:name="P101" style:family="paragraph" style:parent-style-name="Heading_20_4">
      <style:text-properties officeooo:rsid="00463aa5" officeooo:paragraph-rsid="00463aa5"/>
    </style:style>
    <style:style style:name="P102" style:family="paragraph" style:parent-style-name="Text_20_body">
      <style:text-properties officeooo:rsid="00463aa5" officeooo:paragraph-rsid="00463aa5"/>
    </style:style>
    <style:style style:name="P103" style:family="paragraph" style:parent-style-name="Heading_20_3">
      <style:text-properties officeooo:rsid="0047775a" officeooo:paragraph-rsid="0047775a"/>
    </style:style>
    <style:style style:name="P104" style:family="paragraph" style:parent-style-name="Text_20_body">
      <style:text-properties officeooo:rsid="0047775a" officeooo:paragraph-rsid="0047775a"/>
    </style:style>
    <style:style style:name="P105" style:family="paragraph" style:parent-style-name="Text_20_body">
      <style:text-properties officeooo:rsid="0048696d" officeooo:paragraph-rsid="0048696d"/>
    </style:style>
    <style:style style:name="P106" style:family="paragraph" style:parent-style-name="Heading_20_4">
      <style:text-properties officeooo:rsid="004dc5ae" officeooo:paragraph-rsid="004dc5ae"/>
    </style:style>
    <style:style style:name="P107" style:family="paragraph" style:parent-style-name="Text_20_body">
      <style:text-properties officeooo:rsid="004dc5ae" officeooo:paragraph-rsid="004f6efa"/>
    </style:style>
    <style:style style:name="P108" style:family="paragraph" style:parent-style-name="Text_20_body">
      <style:text-properties officeooo:paragraph-rsid="004f6efa"/>
    </style:style>
    <style:style style:name="P109" style:family="paragraph" style:parent-style-name="Heading_20_3" style:list-style-name="">
      <style:text-properties officeooo:rsid="0062442b" officeooo:paragraph-rsid="0062442b"/>
    </style:style>
    <style:style style:name="P110" style:family="paragraph" style:parent-style-name="Heading_20_3">
      <style:paragraph-properties fo:break-before="page"/>
      <style:text-properties officeooo:rsid="0062442b" officeooo:paragraph-rsid="0062442b"/>
    </style:style>
    <style:style style:name="P111" style:family="paragraph" style:parent-style-name="Text_20_body">
      <style:text-properties officeooo:rsid="0062442b" officeooo:paragraph-rsid="0062442b"/>
    </style:style>
    <style:style style:name="P112" style:family="paragraph" style:parent-style-name="Text_20_body">
      <style:text-properties officeooo:rsid="0065d23b" officeooo:paragraph-rsid="0065d23b"/>
    </style:style>
    <style:style style:name="P113" style:family="paragraph" style:parent-style-name="Heading_20_2">
      <style:paragraph-properties fo:break-before="page"/>
      <style:text-properties officeooo:rsid="00387e9a" officeooo:paragraph-rsid="00387e9a"/>
    </style:style>
    <style:style style:name="P114" style:family="paragraph" style:parent-style-name="Text_20_body">
      <style:text-properties officeooo:rsid="00387e9a" officeooo:paragraph-rsid="00387e9a"/>
    </style:style>
    <style:style style:name="P115" style:family="paragraph" style:parent-style-name="Text_20_body">
      <style:text-properties officeooo:rsid="003d1a49" officeooo:paragraph-rsid="003d1a49"/>
    </style:style>
    <style:style style:name="P11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3a37b8" officeooo:paragraph-rsid="003a37b8"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3a37b8"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officeooo:rsid="00387e9a" officeooo:paragraph-rsid="003a37b8"/>
    </style:style>
    <style:style style:name="P119" style:family="paragraph" style:parent-style-name="Standard">
      <style:text-properties officeooo:rsid="00387e9a" officeooo:paragraph-rsid="003a37b8"/>
    </style:style>
    <style:style style:name="P120" style:family="paragraph" style:parent-style-name="Text_20_body">
      <style:text-properties officeooo:rsid="003f4b3d" officeooo:paragraph-rsid="003f4b3d"/>
    </style:style>
    <style:style style:name="P121" style:family="paragraph" style:parent-style-name="Text_20_body">
      <style:text-properties officeooo:rsid="005ab2c4" officeooo:paragraph-rsid="003f4b3d"/>
    </style:style>
    <style:style style:name="P122" style:family="paragraph" style:parent-style-name="Heading_20_2">
      <style:paragraph-properties fo:break-before="page"/>
      <style:text-properties officeooo:rsid="004714d9" officeooo:paragraph-rsid="004714d9"/>
    </style:style>
    <style:style style:name="P123" style:family="paragraph" style:parent-style-name="Text_20_body">
      <style:text-properties officeooo:rsid="004b1c1b" officeooo:paragraph-rsid="004b1c1b"/>
    </style:style>
    <style:style style:name="P124" style:family="paragraph" style:parent-style-name="Text_20_body">
      <style:text-properties fo:font-weight="normal" officeooo:rsid="004d059c" officeooo:paragraph-rsid="004b1c1b" style:font-weight-asian="normal" style:font-weight-complex="normal"/>
    </style:style>
    <style:style style:name="P125" style:family="paragraph" style:parent-style-name="Text_20_body">
      <style:text-properties officeooo:rsid="00643d11" officeooo:paragraph-rsid="00643d11"/>
    </style:style>
    <style:style style:name="P126" style:family="paragraph" style:parent-style-name="Heading_20_3" style:list-style-name="">
      <style:text-properties officeooo:rsid="00643d11" officeooo:paragraph-rsid="00643d11"/>
    </style:style>
    <style:style style:name="P127" style:family="paragraph" style:parent-style-name="Heading_20_3">
      <style:paragraph-properties fo:break-before="page"/>
      <style:text-properties officeooo:rsid="00643d11" officeooo:paragraph-rsid="00643d11"/>
    </style:style>
    <style:style style:name="P128" style:family="paragraph" style:parent-style-name="Text_20_body">
      <style:text-properties officeooo:rsid="0064beec" officeooo:paragraph-rsid="0064beec"/>
    </style:style>
    <style:style style:name="P129"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64beec" officeooo:paragraph-rsid="0064beec"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Heading_20_1">
      <style:paragraph-properties fo:break-before="page"/>
      <style:text-properties officeooo:rsid="0052401e" officeooo:paragraph-rsid="0052401e"/>
    </style:style>
    <style:style style:name="P131" style:family="paragraph" style:parent-style-name="Heading_20_2">
      <style:text-properties officeooo:rsid="005b6d09" officeooo:paragraph-rsid="005b6d09"/>
    </style:style>
    <style:style style:name="P132" style:family="paragraph" style:parent-style-name="Text_20_body">
      <style:text-properties officeooo:rsid="005b6d09" officeooo:paragraph-rsid="005b6d09"/>
    </style:style>
    <style:style style:name="P133" style:family="paragraph" style:parent-style-name="Standard">
      <loext:graphic-properties draw:fill="solid" draw:fill-color="#f8f8f8" draw:opacity="100%"/>
      <style:paragraph-properties ch2_options="{'Style': 'default', 'Language': 'Python', 'UseCharStyles': 0, 'PreviewOnStart': 0, 'CustomStylePath': '$(user)/codehighlighter2/styles',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5b6d09" fo:background-color="transparent"/>
    </style:style>
    <style:style style:name="P134" style:family="paragraph" style:parent-style-name="Standard">
      <loext:graphic-properties draw:fill="solid" draw:fill-color="#f8f8f8" draw:opacity="100%"/>
      <style:paragraph-properties ch2_options="{'Style': 'default', 'Language': 'Python', 'UseCharStyles': 0, 'PreviewOnStart': 0, 'CustomStylePath': '$(user)/codehighlighter2/styles', 'LineNumberRatio': 100, 'LineNumberStart': 1, 'MasterCharStyle': '', 'ShowLineNumbers': 0, 'ColourizeBackground': 1, 'LineNumberSeparator': ' ', 'LineNumberPaddingSymbol': '', 'StoreOptionsWithSnippet': 1}" fo:background-color="#f8f8f8"/>
      <style:text-properties fo:color="#bbbbbb" loext:opacity="100%" style:font-name="Droid Sans Mono" fo:font-size="10.5pt" fo:language="zxx" fo:country="none" fo:font-style="normal" style:text-underline-style="none" fo:font-weight="normal" officeooo:rsid="005b6d09" officeooo:paragraph-rsid="005b6d09" fo:background-color="transparent"/>
    </style:style>
    <style:style style:name="P135" style:family="paragraph" style:parent-style-name="Standard">
      <loext:graphic-properties draw:fill="solid" draw:fill-color="#f8f8f8" draw:opacity="100%"/>
      <style:paragraph-properties ch2_options="{'Style': 'default', 'Language': 'Python', 'UseCharStyles': 0, 'PreviewOnStart': 0, 'CustomStylePath': '$(user)/codehighlighter2/styles', 'LineNumberRatio': 100, 'LineNumberStart': 1, 'MasterCharStyle': '', 'ShowLineNumbers': 0, 'ColourizeBackground': 1, 'LineNumberSeparator': ' ', 'LineNumberPaddingSymbol': '', 'StoreOptionsWithSnippet': 1}" fo:margin-left="0cm" fo:margin-right="0cm" style:line-height-at-least="0.503cm" fo:text-indent="0cm" style:auto-text-indent="false" fo:background-color="#f8f8f8"/>
      <style:text-properties style:use-window-font-color="true" loext:opacity="0%" style:font-name="Droid Sans Mono" fo:font-size="10.5pt" fo:language="zxx" fo:country="none" fo:font-style="normal" style:text-underline-style="none" fo:font-weight="normal" fo:background-color="transparent"/>
    </style:style>
    <style:style style:name="P136" style:family="paragraph" style:parent-style-name="Standard">
      <loext:graphic-properties draw:fill="solid" draw:fill-color="#f8f8f8" draw:opacity="100%"/>
      <style:paragraph-properties ch2_options="{'Style': 'default', 'Language': 'Python', 'UseCharStyles': 0, 'PreviewOnStart': 0, 'CustomStylePath': '$(user)/codehighlighter2/styles', 'LineNumberRatio': 100, 'LineNumberStart': 1, 'MasterCharStyle': '', 'ShowLineNumbers': 0, 'ColourizeBackground': 1, 'LineNumberSeparator': ' ', 'LineNumberPaddingSymbol': '', 'StoreOptionsWithSnippet': 1}" style:line-height-at-least="0.503cm" fo:background-color="#f8f8f8"/>
      <style:text-properties fo:color="#bbbbbb" loext:opacity="100%" style:font-name="Droid Sans Mono" fo:font-size="10.5pt" fo:language="zxx" fo:country="none" fo:font-style="normal" style:text-underline-style="none" fo:font-weight="normal" fo:background-color="transparent"/>
    </style:style>
    <style:style style:name="P137" style:family="paragraph" style:parent-style-name="Standard">
      <loext:graphic-properties draw:fill="solid" draw:fill-color="#f8f8f8" draw:opacity="100%"/>
      <style:paragraph-properties ch2_options="{'Style': 'default', 'Language': 'Python', 'UseCharStyles': 0, 'PreviewOnStart': 0, 'CustomStylePath': '$(user)/codehighlighter2/styles', 'LineNumberRatio': 100, 'LineNumberStart': 1, 'MasterCharStyle': '', 'ShowLineNumbers': 0, 'ColourizeBackground': 1, 'LineNumberSeparator': ' ', 'LineNumberPaddingSymbol': '', 'StoreOptionsWithSnippet': 1}" fo:margin-left="0cm" fo:margin-right="0cm" style:line-height-at-least="0.503cm" fo:text-indent="0cm" style:auto-text-indent="false" fo:background-color="#f8f8f8"/>
      <style:text-properties style:use-window-font-color="true" loext:opacity="0%" style:font-name="Droid Sans Mono" fo:font-size="10.5pt" fo:language="zxx" fo:country="none" fo:font-style="normal" style:text-underline-style="none" fo:font-weight="normal" officeooo:rsid="005c8f27" fo:background-color="transparent"/>
    </style:style>
    <style:style style:name="P138" style:family="paragraph" style:parent-style-name="Standard">
      <loext:graphic-properties draw:fill="solid" draw:fill-color="#f8f8f8" draw:opacity="100%"/>
      <style:paragraph-properties ch2_options="{'Style': 'default', 'Language': 'Python', 'UseCharStyles': 0, 'PreviewOnStart': 0, 'CustomStylePath': '$(user)/codehighlighter2/styles', 'LineNumberRatio': 100, 'LineNumberStart': 1, 'MasterCharStyle': '', 'ShowLineNumbers': 0, 'ColourizeBackground': 1, 'LineNumberSeparator': ' ', 'LineNumberPaddingSymbol': '', 'StoreOptionsWithSnippet': 1}" fo:margin-left="0cm" fo:margin-right="0cm" style:line-height-at-least="0.503cm" fo:text-indent="0cm" style:auto-text-indent="false" fo:background-color="#f8f8f8"/>
      <style:text-properties fo:color="#3d7b7b" loext:opacity="100%" style:font-name="Droid Sans Mono" fo:font-size="10.5pt" fo:language="zxx" fo:country="none" fo:font-style="italic" style:text-underline-style="none" fo:font-weight="normal" officeooo:rsid="005c8f27" officeooo:paragraph-rsid="005c8f27" fo:background-color="transparent"/>
    </style:style>
    <style:style style:name="P139" style:family="paragraph" style:parent-style-name="Standard">
      <loext:graphic-properties draw:fill="solid" draw:fill-color="#f8f8f8" draw:opacity="100%"/>
      <style:paragraph-properties fo:margin-left="0cm" fo:margin-right="0cm" style:line-height-at-least="0.503cm" fo:text-indent="0cm" style:auto-text-indent="false" fo:background-color="#f8f8f8"/>
      <style:text-properties style:use-window-font-color="true" loext:opacity="0%" style:font-name="Droid Sans Mono" fo:font-size="10.5pt" fo:language="zxx" fo:country="none" fo:font-style="normal" style:text-underline-style="none" fo:font-weight="normal" fo:background-color="transparent"/>
    </style:style>
    <style:style style:name="P140" style:family="paragraph" style:parent-style-name="Standard">
      <loext:graphic-properties draw:fill="solid" draw:fill-color="#f8f8f8" draw:opacity="100%"/>
      <style:paragraph-properties fo:margin-left="0cm" fo:margin-right="0cm" style:line-height-at-least="0.503cm" fo:text-indent="0cm" style:auto-text-indent="false" fo:background-color="#f8f8f8"/>
      <style:text-properties fo:color="#000000" loext:opacity="100%" style:font-name="Droid Sans Mono" fo:font-size="10.5pt" fo:language="zxx" fo:country="none" fo:font-style="normal" style:text-underline-style="none" fo:font-weight="normal" fo:background-color="transparent"/>
    </style:style>
    <style:style style:name="P141" style:family="paragraph" style:parent-style-name="Standard">
      <loext:graphic-properties draw:fill="solid" draw:fill-color="#f8f8f8" draw:opacity="100%"/>
      <style:paragraph-properties fo:margin-left="0cm" fo:margin-right="0cm" style:line-height-at-least="0.503cm" fo:text-indent="0cm" style:auto-text-indent="false" fo:background-color="#f8f8f8"/>
      <style:text-properties fo:color="#3d7b7b" loext:opacity="100%" style:font-name="Droid Sans Mono" fo:font-size="10.5pt" fo:language="zxx" fo:country="none" fo:font-style="italic" style:text-underline-style="none" fo:font-weight="normal" officeooo:rsid="005c8f27" officeooo:paragraph-rsid="005c8f27" fo:background-color="transparent"/>
    </style:style>
    <style:style style:name="P142" style:family="paragraph" style:parent-style-name="Heading_20_2">
      <style:text-properties officeooo:rsid="005e1550" officeooo:paragraph-rsid="005e1550"/>
    </style:style>
    <style:style style:name="P143" style:family="paragraph" style:parent-style-name="Text_20_body">
      <style:text-properties officeooo:rsid="005e1550" officeooo:paragraph-rsid="005e1550"/>
    </style:style>
    <style:style style:name="P144" style:family="paragraph" style:parent-style-name="Text_20_body" style:list-style-name="L8">
      <style:text-properties officeooo:rsid="005e1550" officeooo:paragraph-rsid="005e1550"/>
    </style:style>
    <style:style style:name="P145" style:family="paragraph" style:parent-style-name="Text_20_body">
      <style:text-properties officeooo:rsid="005f6146" officeooo:paragraph-rsid="005f6146"/>
    </style:style>
    <style:style style:name="P146" style:family="paragraph" style:parent-style-name="Heading_20_1">
      <style:paragraph-properties fo:break-before="page"/>
      <style:text-properties officeooo:rsid="0065d23b" officeooo:paragraph-rsid="0065d23b"/>
    </style:style>
    <style:style style:name="P147" style:family="paragraph" style:parent-style-name="Text_20_body">
      <style:text-properties officeooo:rsid="0065d23b" officeooo:paragraph-rsid="0067a272"/>
    </style:style>
    <style:style style:name="P148" style:family="paragraph" style:parent-style-name="Text_20_body">
      <style:text-properties officeooo:rsid="0067a272" officeooo:paragraph-rsid="0067a272"/>
    </style:style>
    <style:style style:name="P149" style:family="paragraph" style:parent-style-name="Text_20_body" style:list-style-name="L9">
      <style:text-properties officeooo:rsid="0067a272" officeooo:paragraph-rsid="0067a272"/>
    </style:style>
    <style:style style:name="P150" style:family="paragraph" style:parent-style-name="Text_20_body" style:list-style-name="L9">
      <style:text-properties officeooo:rsid="00689625" officeooo:paragraph-rsid="00689625"/>
    </style:style>
    <style:style style:name="P151" style:family="paragraph" style:parent-style-name="Text_20_body" style:list-style-name="L9">
      <style:text-properties officeooo:rsid="0068e4c0" officeooo:paragraph-rsid="0068e4c0"/>
    </style:style>
    <style:style style:name="T1" style:family="text">
      <style:text-properties officeooo:rsid="00123dae"/>
    </style:style>
    <style:style style:name="T2" style:family="text">
      <style:text-properties officeooo:rsid="0013468b"/>
    </style:style>
    <style:style style:name="T3" style:family="text">
      <style:text-properties officeooo:rsid="00139efc"/>
    </style:style>
    <style:style style:name="T4" style:family="text">
      <style:text-properties officeooo:rsid="005aacaa"/>
    </style:style>
    <style:style style:name="T5" style:family="text">
      <style:text-properties officeooo:rsid="005378e3"/>
    </style:style>
    <style:style style:name="T6" style:family="text">
      <style:text-properties officeooo:rsid="0013470d"/>
    </style:style>
    <style:style style:name="T7" style:family="text">
      <style:text-properties fo:language="en" fo:country="AU"/>
    </style:style>
    <style:style style:name="T8" style:family="text">
      <style:text-properties fo:language="en" fo:country="AU" officeooo:rsid="00139efc"/>
    </style:style>
    <style:style style:name="T9" style:family="text">
      <style:text-properties officeooo:rsid="00583614"/>
    </style:style>
    <style:style style:name="T10" style:family="text">
      <style:text-properties officeooo:rsid="0061be42"/>
    </style:style>
    <style:style style:name="T11" style:family="text">
      <style:text-properties officeooo:rsid="00596b7b"/>
    </style:style>
    <style:style style:name="T12" style:family="text">
      <style:text-properties officeooo:rsid="0054b4b7"/>
    </style:style>
    <style:style style:name="T13" style:family="text">
      <style:text-properties officeooo:rsid="0055e73f"/>
    </style:style>
    <style:style style:name="T14" style:family="text">
      <style:text-properties fo:language="en" fo:country="AU" officeooo:rsid="00148fe0"/>
    </style:style>
    <style:style style:name="T15" style:family="text">
      <style:text-properties officeooo:rsid="0022937d"/>
    </style:style>
    <style:style style:name="T16" style:family="text">
      <style:text-properties officeooo:rsid="00187bee"/>
    </style:style>
    <style:style style:name="T17" style:family="text">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6157a"/>
    </style:style>
    <style:style style:name="T18" style:family="text">
      <style:text-properties officeooo:rsid="0016bd00"/>
    </style:style>
    <style:style style:name="T19" style:family="text">
      <style:text-properties style:text-underline-style="solid" style:text-underline-width="auto" style:text-underline-color="font-color"/>
    </style:style>
    <style:style style:name="T20" style:family="text">
      <style:text-properties officeooo:rsid="001f33d0"/>
    </style:style>
    <style:style style:name="T21" style:family="text">
      <style:text-properties officeooo:rsid="002e83f5"/>
    </style:style>
    <style:style style:name="T22" style:family="text">
      <style:text-properties officeooo:rsid="002d5f2f"/>
    </style:style>
    <style:style style:name="T23" style:family="text">
      <style:text-properties officeooo:rsid="00212192"/>
    </style:style>
    <style:style style:name="T24" style:family="text">
      <style:text-properties fo:language="en" fo:country="AU" officeooo:rsid="00212192"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officeooo:rsid="005ab2c4"/>
    </style:style>
    <style:style style:name="T26" style:family="text">
      <style:text-properties officeooo:rsid="0023fc48"/>
    </style:style>
    <style:style style:name="T27" style:family="text">
      <style:text-properties officeooo:rsid="002a519a"/>
    </style:style>
    <style:style style:name="T28" style:family="text">
      <style:text-properties officeooo:rsid="0067a272"/>
    </style:style>
    <style:style style:name="T29" style:family="text">
      <style:text-properties style:text-underline-style="none"/>
    </style:style>
    <style:style style:name="T30" style:family="text">
      <style:text-properties officeooo:rsid="002a67a8"/>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3291f5" style:font-style-asian="italic" style:font-weight-asian="normal" style:font-style-complex="italic" style:font-weight-complex="normal"/>
    </style:style>
    <style:style style:name="T34" style:family="text">
      <style:text-properties officeooo:rsid="00331440"/>
    </style:style>
    <style:style style:name="T35" style:family="text">
      <style:text-properties officeooo:rsid="0034f69f"/>
    </style:style>
    <style:style style:name="T36" style:family="text">
      <style:text-properties officeooo:rsid="00387e9a"/>
    </style:style>
    <style:style style:name="T37" style:family="text">
      <style:text-properties officeooo:rsid="0041c288"/>
    </style:style>
    <style:style style:name="T38" style:family="text">
      <style:text-properties officeooo:rsid="00429e98"/>
    </style:style>
    <style:style style:name="T39" style:family="text">
      <style:text-properties fo:font-weight="bold" style:font-weight-asian="bold" style:font-weight-complex="bold"/>
    </style:style>
    <style:style style:name="T40" style:family="text">
      <style:text-properties officeooo:rsid="004421e6"/>
    </style:style>
    <style:style style:name="T41" style:family="text">
      <style:text-properties officeooo:rsid="004484fc"/>
    </style:style>
    <style:style style:name="T42" style:family="text">
      <style:text-properties officeooo:rsid="00680075"/>
    </style:style>
    <style:style style:name="T43" style:family="text">
      <style:text-properties officeooo:rsid="0044f15a"/>
    </style:style>
    <style:style style:name="T44" style:family="text">
      <style:text-properties fo:font-weight="normal" style:font-weight-asian="normal" style:font-weight-complex="normal"/>
    </style:style>
    <style:style style:name="T45" style:family="text">
      <style:text-properties officeooo:rsid="00463aa5"/>
    </style:style>
    <style:style style:name="T46" style:family="text">
      <style:text-properties officeooo:rsid="004dc5ae"/>
    </style:style>
    <style:style style:name="T47" style:family="text">
      <style:text-properties officeooo:rsid="004714d9"/>
    </style:style>
    <style:style style:name="T48" style:family="text">
      <style:text-properties officeooo:rsid="0049292b"/>
    </style:style>
    <style:style style:name="T49" style:family="text">
      <style:text-properties officeooo:rsid="004f6efa"/>
    </style:style>
    <style:style style:name="T50" style:family="text">
      <style:text-properties officeooo:rsid="0062442b"/>
    </style:style>
    <style:style style:name="T51" style:family="text">
      <style:text-properties officeooo:rsid="0065d23b"/>
    </style:style>
    <style:style style:name="T52" style:family="text">
      <style:text-properties officeooo:rsid="003a37b8"/>
    </style:style>
    <style:style style:name="T53" style:family="text">
      <style:text-properties officeooo:rsid="003d947b"/>
    </style:style>
    <style:style style:name="T54" style:family="text">
      <style:text-properties officeooo:rsid="003f4b3d"/>
    </style:style>
    <style:style style:name="T55" style:family="text">
      <style:text-properties officeooo:rsid="004d059c"/>
    </style:style>
    <style:style style:name="T56" style:family="text">
      <style:text-properties officeooo:rsid="005c8f27"/>
    </style:style>
    <style:style style:name="T57" style:family="text">
      <style:text-properties officeooo:rsid="005e0d39"/>
    </style:style>
    <style:style style:name="T58" style:family="text">
      <style:text-properties fo:color="#000000" loext:opacity="100%" style:font-name="Droid Sans Mono" fo:font-size="10.5pt" officeooo:rsid="005c8f27"/>
    </style:style>
    <style:style style:name="T59" style:family="text">
      <style:text-properties fo:color="#000000" loext:opacity="100%" style:font-name="Droid Sans Mono" fo:font-size="10.5pt" officeooo:rsid="005b6d09"/>
    </style:style>
    <style:style style:name="T60" style:family="text">
      <style:text-properties fo:color="#666666" loext:opacity="100%" style:font-name="Droid Sans Mono" fo:font-size="10.5pt" officeooo:rsid="005b6d09"/>
    </style:style>
    <style:style style:name="T61" style:family="text">
      <style:text-properties fo:color="#008000" loext:opacity="100%" fo:font-weight="bold"/>
    </style:style>
    <style:style style:name="T62" style:family="text">
      <style:text-properties fo:color="#bbbbbb" loext:opacity="100%"/>
    </style:style>
    <style:style style:name="T63" style:family="text">
      <style:text-properties fo:color="#0000ff" loext:opacity="100%"/>
    </style:style>
    <style:style style:name="T64" style:family="text">
      <style:text-properties fo:color="#000000" loext:opacity="100%"/>
    </style:style>
    <style:style style:name="T65" style:family="text">
      <style:text-properties fo:color="#3d7b7b" loext:opacity="100%" fo:font-style="italic"/>
    </style:style>
    <style:style style:name="T66" style:family="text">
      <style:text-properties fo:color="#666666" loext:opacity="100%"/>
    </style:style>
    <style:style style:name="T67" style:family="text">
      <style:text-properties fo:color="#bbbbbb" loext:opacity="100%" fo:font-style="normal" style:text-underline-style="none" fo:font-weight="normal"/>
    </style:style>
    <style:style style:name="T68" style:family="text">
      <style:text-properties officeooo:rsid="005f614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5cm, 0.15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ALP8B Computer Projec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3_2393393095" office:name="Project Scope &amp; Summary" text:style-name="Index_20_Link" text:visited-style-name="Index_20_Link">1 Project Scope &amp; Summary<text:tab/>3</text:a></text:p>
          <text:p text:style-name="P3"><text:a xlink:type="simple" xlink:href="#__RefHeading___Toc160_2393393095" office:name="ISA Overview &amp; Reference Table" text:style-name="Index_20_Link" text:visited-style-name="Index_20_Link">2 ISA Overview &amp; Reference Table<text:tab/>4</text:a></text:p>
          <text:p text:style-name="P4"><text:a xlink:type="simple" xlink:href="#__RefHeading___Toc999_1575828878" office:name="Core Specifications" text:style-name="Index_20_Link" text:visited-style-name="Index_20_Link">2.1 Core Specifications<text:tab/>4</text:a></text:p>
          <text:p text:style-name="P4"><text:a xlink:type="simple" xlink:href="#__RefHeading___Toc1001_1575828878" office:name="Instruction Encoding" text:style-name="Index_20_Link" text:visited-style-name="Index_20_Link">2.2 Instruction Encoding<text:tab/>4</text:a></text:p>
          <text:p text:style-name="P4"><text:a xlink:type="simple" xlink:href="#__RefHeading___Toc4064_1996774639" office:name="Reference Tables" text:style-name="Index_20_Link" text:visited-style-name="Index_20_Link">2.3 Reference Tables<text:tab/>5</text:a></text:p>
          <text:p text:style-name="P5"><text:a xlink:type="simple" xlink:href="#__RefHeading___Toc4066_1996774639" office:name="Format A Instructions" text:style-name="Index_20_Link" text:visited-style-name="Index_20_Link">2.3.1 Format A Instructions<text:tab/>5</text:a></text:p>
          <text:p text:style-name="P5"><text:a xlink:type="simple" xlink:href="#__RefHeading___Toc4068_1996774639" office:name="Format B Instructions" text:style-name="Index_20_Link" text:visited-style-name="Index_20_Link">2.3.2 Format B Instructions<text:tab/>6</text:a></text:p>
          <text:p text:style-name="P5"><text:a xlink:type="simple" xlink:href="#__RefHeading___Toc4070_1996774639" office:name="Format C Instructions" text:style-name="Index_20_Link" text:visited-style-name="Index_20_Link">2.3.3 Format C Instructions<text:tab/>6</text:a></text:p>
          <text:p text:style-name="P3"><text:a xlink:type="simple" xlink:href="#__RefHeading___Toc1101_1575828878" office:name="ISA Design Decisions" text:style-name="Index_20_Link" text:visited-style-name="Index_20_Link">3 ISA Design Decisions<text:tab/>7</text:a></text:p>
          <text:p text:style-name="P4"><text:a xlink:type="simple" xlink:href="#__RefHeading___Toc1103_1575828878" office:name="Architectural Scope" text:style-name="Index_20_Link" text:visited-style-name="Index_20_Link">3.1 Architectural Scope<text:tab/>7</text:a></text:p>
          <text:p text:style-name="P4"><text:a xlink:type="simple" xlink:href="#__RefHeading___Toc1105_1575828878" office:name="ALU Optimisation &amp; Quirks" text:style-name="Index_20_Link" text:visited-style-name="Index_20_Link">3.2 ALU Optimisation &amp; Quirks<text:tab/>7</text:a></text:p>
          <text:p text:style-name="P4"><text:a xlink:type="simple" xlink:href="#__RefHeading___Toc1414_1575828878" office:name="Branching" text:style-name="Index_20_Link" text:visited-style-name="Index_20_Link">3.3 Branching<text:tab/>7</text:a></text:p>
          <text:p text:style-name="P4"><text:a xlink:type="simple" xlink:href="#__RefHeading___Toc1416_1575828878" office:name="Memory Indirect Addressing" text:style-name="Index_20_Link" text:visited-style-name="Index_20_Link">3.4 Memory Indirect Addressing<text:tab/>8</text:a></text:p>
          <text:p text:style-name="P4"><text:a xlink:type="simple" xlink:href="#__RefHeading___Toc1418_1575828878" office:name="Other Decisions" text:style-name="Index_20_Link" text:visited-style-name="Index_20_Link">3.5 Other Decisions<text:tab/>8</text:a></text:p>
          <text:p text:style-name="P3"><text:a xlink:type="simple" xlink:href="#__RefHeading___Toc1997_316657009" office:name="Hardware Implementation" text:style-name="Index_20_Link" text:visited-style-name="Index_20_Link">4 Hardware Implementation<text:tab/>9</text:a></text:p>
          <text:p text:style-name="P4"><text:a xlink:type="simple" xlink:href="#__RefHeading___Toc1999_316657009" office:name="System Microarchitecture &amp; Block Diagram" text:style-name="Index_20_Link" text:visited-style-name="Index_20_Link">4.1 System Microarchitecture &amp; Block Diagram<text:tab/>9</text:a></text:p>
          <text:p text:style-name="P5"><text:a xlink:type="simple" xlink:href="#__RefHeading___Toc2001_316657009" office:name=" Summary of Execution Cycle" text:style-name="Index_20_Link" text:visited-style-name="Index_20_Link">4.1.1 <text:s/>Summary of Execution Cycle<text:tab/>9</text:a></text:p>
          <text:p text:style-name="P4"><text:a xlink:type="simple" xlink:href="#__RefHeading___Toc2034_423618348" office:name="Control Unit" text:style-name="Index_20_Link" text:visited-style-name="Index_20_Link">4.2 Control Unit<text:tab/>10</text:a></text:p>
          <text:p text:style-name="P5"><text:a xlink:type="simple" xlink:href="#__RefHeading___Toc2003_316657009" office:name="Sequencer" text:style-name="Index_20_Link" text:visited-style-name="Index_20_Link">4.2.1 Sequencer<text:tab/>10</text:a></text:p>
          <text:p text:style-name="P5"><text:a xlink:type="simple" xlink:href="#__RefHeading___Toc2005_316657009" office:name="Microcode ROM" text:style-name="Index_20_Link" text:visited-style-name="Index_20_Link">4.2.2 Microcode ROM<text:tab/>10</text:a></text:p>
          <text:p text:style-name="P6"><text:a xlink:type="simple" xlink:href="#__RefHeading___Toc2007_316657009" office:name="Microcode enabling" text:style-name="Index_20_Link" text:visited-style-name="Index_20_Link">4.2.2.1 Microcode enabling<text:tab/>12</text:a></text:p>
          <text:p text:style-name="P6"><text:a xlink:type="simple" xlink:href="#__RefHeading___Toc2009_316657009" office:name="Future Considerations" text:style-name="Index_20_Link" text:visited-style-name="Index_20_Link">4.2.2.2 Future Considerations<text:tab/>12</text:a></text:p>
          <text:p text:style-name="P5"><text:a xlink:type="simple" xlink:href="#__RefHeading___Toc2018_1996774639" office:name="Program Counter" text:style-name="Index_20_Link" text:visited-style-name="Index_20_Link">4.2.3 Program Counter<text:tab/>13</text:a></text:p>
          <text:p text:style-name="P6"><text:a xlink:type="simple" xlink:href="#__RefHeading___Toc2730_1996774639" office:name="Branching" text:style-name="Index_20_Link" text:visited-style-name="Index_20_Link">4.2.3.1 Branching<text:tab/>14</text:a></text:p>
          <text:p text:style-name="P5"><text:a xlink:type="simple" xlink:href="#__RefHeading___Toc2542_4286045557" office:name="Hardwired “Housekeeping” Instructions" text:style-name="Index_20_Link" text:visited-style-name="Index_20_Link">4.2.4 Hardwired “Housekeeping” Instructions<text:tab/>15</text:a></text:p>
          <text:p text:style-name="P4"><text:a xlink:type="simple" xlink:href="#__RefHeading___Toc2011_316657009" office:name="Arithmetic Logic Unit (ALU)" text:style-name="Index_20_Link" text:visited-style-name="Index_20_Link">4.3 Arithmetic Logic Unit (ALU)<text:tab/>16</text:a></text:p>
          <text:p text:style-name="P4"><text:a xlink:type="simple" xlink:href="#__RefHeading___Toc1743_316657009" office:name="Register File" text:style-name="Index_20_Link" text:visited-style-name="Index_20_Link">4.4 Register File<text:tab/>17</text:a></text:p>
          <text:p text:style-name="P5"><text:a xlink:type="simple" xlink:href="#__RefHeading___Toc2544_4286045557" office:name="Flags Register" text:style-name="Index_20_Link" text:visited-style-name="Index_20_Link">4.4.1 Flags Register<text:tab/>18</text:a></text:p>
          <text:p text:style-name="P3"><text:a xlink:type="simple" xlink:href="#__RefHeading___Toc2732_1996774639" office:name="Software" text:style-name="Index_20_Link" text:visited-style-name="Index_20_Link">5 Software<text:tab/>19</text:a></text:p>
          <text:p text:style-name="P4"><text:a xlink:type="simple" xlink:href="#__RefHeading___Toc2145_4286045557" office:name="Microcode Programming" text:style-name="Index_20_Link" text:visited-style-name="Index_20_Link">5.1 Microcode Programming<text:tab/>19</text:a></text:p>
          <text:p text:style-name="P4"><text:a xlink:type="simple" xlink:href="#__RefHeading___Toc2147_4286045557" office:name="Assembler" text:style-name="Index_20_Link" text:visited-style-name="Index_20_Link">5.2 Assembler<text:tab/>19</text:a></text:p>
          <text:p text:style-name="P3"><text:a xlink:type="simple" xlink:href="#__RefHeading___Toc2394_2056641800" office:name="Learnings &amp; Next steps" text:style-name="Index_20_Link" text:visited-style-name="Index_20_Link">6 Learnings &amp; Next steps<text:tab/>20</text:a></text:p>
        </text:index-body>
      </text:table-of-content>
      <text:h text:style-name="P7" text:outline-level="1"/>
      <text:h text:style-name="P8" text:outline-level="1"><text:bookmark-start text:name="__RefHeading___Toc3_2393393095"/>Project Scope &amp; Summary<text:bookmark-end text:name="__RefHeading___Toc3_2393393095"/></text:h>
      <text:p text:style-name="P9"/>
      <text:p text:style-name="P9"/>
      <text:h text:style-name="P8" text:outline-level="1"><text:bookmark-start text:name="__RefHeading___Toc160_2393393095"/><text:span text:style-name="T1">I</text:span>SA Overview &amp; Reference Table<text:bookmark-end text:name="__RefHeading___Toc160_2393393095"/></text:h>
      <text:p text:style-name="P10"><text:span text:style-name="T2">The</text:span> architecture <text:span text:style-name="T2">of the ALP8B </text:span>is a custom 8-bit, Load/Store RISC-inspired Instruction Set Architecture (ISA). It utili<text:span text:style-name="T1">s</text:span>es a <text:span text:style-name="T1">(mostly) single byte instruction width to ensure code density within an 8-bit</text:span><text:span text:style-name="T2"> Von Neumann </text:span><text:span text:style-name="T3">instruction</text:span><text:span text:style-name="T2">/data memory space</text:span><text:span text:style-name="T1">.</text:span></text:p>
      <text:h text:style-name="P11" text:outline-level="2"><text:bookmark-start text:name="__RefHeading___Toc999_1575828878"/>Core Specifications<text:bookmark-end text:name="__RefHeading___Toc999_1575828878"/></text:h>
      <text:list text:style-name="L1">
        <text:list-item>
          <text:p text:style-name="P12">Word size: 8-bit</text:p>
        </text:list-item>
        <text:list-item>
          <text:p text:style-name="P13">Instruction length: <text:span text:style-name="T4">M</text:span>ajority 1-<text:span text:style-name="T5">word</text:span>, 2-<text:span text:style-name="T5">word</text:span> special</text:p>
        </text:list-item>
        <text:list-item>
          <text:p text:style-name="P14">Register file: Four 8-bit General Purpose Registers <text:span text:style-name="T6">R0, R1, R2, R3. These are</text:span> <text:span text:style-name="T6">represented by fields RA &amp; RB in instructions </text:span>(00 for R0, 01 for R1, 10 for R2, and 11 for R3).</text:p>
        </text:list-item>
        <text:list-item>
          <text:p text:style-name="P12">Condition flags: Two status flags, Carry (C) and Zero (Z).</text:p>
        </text:list-item>
      </text:list>
      <text:h text:style-name="P15" text:outline-level="2"><text:bookmark-start text:name="__RefHeading___Toc1001_1575828878"/>Instruction Encoding<text:bookmark-end text:name="__RefHeading___Toc1001_1575828878"/></text:h>
      <text:p text:style-name="P16">The ISA is designed with a 2-bit opcode in mind, with a 2-bit opcode extension for additional instruction density. The four major regions are:</text:p>
      <text:list text:style-name="L2">
        <text:list-item>
          <text:p text:style-name="P17">00: Variable, used for “housekeeping” instructions and additional ALU instructions.</text:p>
        </text:list-item>
        <text:list-item>
          <text:p text:style-name="P17">01: <text:span text:style-name="T5">Branching</text:span> instructions.</text:p>
        </text:list-item>
        <text:list-item>
          <text:p text:style-name="P17">10: ALU instructions.</text:p>
        </text:list-item>
        <text:list-item>
          <text:p text:style-name="P17">11: Memory related instructions.</text:p>
        </text:list-item>
      </text:list>
      <text:p text:style-name="P18">Instructions are classified into one of three formats:</text:p>
      <text:list text:style-name="L3">
        <text:list-item>
          <text:p text:style-name="P19">Format A (No Registers):</text:p>
        </text:list-item>
      </text:list>
      <text:p text:style-name="P20"><text:span text:style-name="Source_20_Text"><text:span text:style-name="T7">[Opcode (2b) | Ext 1 (2b) | Ext 2 (2b) | Ext 3 (2b)]</text:span></text:span></text:p>
      <text:list text:continue-numbering="true" text:style-name="L3">
        <text:list-item>
          <text:p text:style-name="P19">Format B (Single Register):</text:p>
        </text:list-item>
      </text:list>
      <text:p text:style-name="P21"><text:span text:style-name="Source_20_Text"><text:span text:style-name="T7">[Opcode (2b) | Ext 1 (2b) | Ext 2 (2b) | </text:span></text:span><text:span text:style-name="Source_20_Text"><text:span text:style-name="T8">RB</text:span></text:span><text:span text:style-name="Source_20_Text"><text:span text:style-name="T7"> <text:s text:c="3"/>(2b)]</text:span></text:span></text:p>
      <text:list text:continue-numbering="true" text:style-name="L3">
        <text:list-item>
          <text:p text:style-name="P22">Format C (Dual Register):</text:p>
        </text:list-item>
      </text:list>
      <text:p text:style-name="P21"><text:span text:style-name="Source_20_Text"><text:span text:style-name="T7">[Opcode (2b) | Ext 1 (2b) | </text:span></text:span><text:span text:style-name="Source_20_Text"><text:span text:style-name="T8">RA <text:s text:c="2"/></text:span></text:span><text:span text:style-name="Source_20_Text"><text:span text:style-name="T7"><text:s/>(2b) | </text:span></text:span><text:span text:style-name="Source_20_Text"><text:span text:style-name="T8">RB <text:s text:c="2"/></text:span></text:span><text:span text:style-name="Source_20_Text"><text:span text:style-name="T7"><text:s/>(2b)]</text:span></text:span></text:p>
      <text:h text:style-name="P23" text:outline-level="2"><text:bookmark-start text:name="__RefHeading___Toc4064_1996774639"/>Reference Tables<text:bookmark-end text:name="__RefHeading___Toc4064_1996774639"/></text:h>
      <text:p text:style-name="P24">The following tables are a full outline of the ISA. <text:span text:style-name="T9">F</text:span>or the Flags column, ‘-’ means uneffected, ‘*’ means updated, and a value of 0/1 means unconditional set. <text:span text:style-name="T9">Cycle count is </text:span><text:span text:style-name="T10">indexed </text:span><text:span text:style-name="T9">from 0, inclusive of the mandatory 2 cycles required for fetching, </text:span><text:span text:style-name="T11">and the step to trigger the reset itself.</text:span></text:p>
      <text:h text:style-name="P25" text:outline-level="3"><text:bookmark-start text:name="__RefHeading___Toc4066_1996774639"/>Format A Instructions<text:bookmark-end text:name="__RefHeading___Toc4066_1996774639"/></text:h>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P26">Encoding [7:0]</text:p>
          </table:table-cell>
          <table:table-cell table:style-name="Table7.A1" office:value-type="string">
            <text:p text:style-name="P26">Mnemonic</text:p>
          </table:table-cell>
          <table:table-cell table:style-name="Table7.A1" office:value-type="string">
            <text:p text:style-name="P26">Operands</text:p>
          </table:table-cell>
          <table:table-cell table:style-name="Table7.A1" office:value-type="string">
            <text:p text:style-name="P26">Operation</text:p>
          </table:table-cell>
          <table:table-cell table:style-name="Table7.A1" office:value-type="string">
            <text:p text:style-name="P26">Description</text:p>
          </table:table-cell>
          <table:table-cell table:style-name="Table7.A1" office:value-type="string">
            <text:p text:style-name="P26">Flags (Z, C)</text:p>
          </table:table-cell>
          <table:table-cell table:style-name="Table7.A1" office:value-type="string">
            <text:p text:style-name="P26">Size (Words)</text:p>
          </table:table-cell>
          <table:table-cell table:style-name="Table7.H1" office:value-type="string">
            <text:p text:style-name="P26">Cycles</text:p>
          </table:table-cell>
        </table:table-row>
        <table:table-row table:style-name="Table7.1">
          <table:table-cell table:style-name="Table7.A2" office:value-type="string">
            <text:p text:style-name="P27"><text:span text:style-name="Source_20_Text"><text:span text:style-name="T5">0000 0000</text:span></text:span></text:p>
          </table:table-cell>
          <table:table-cell table:style-name="Table7.A2" office:value-type="string">
            <text:p text:style-name="P28"><text:span text:style-name="Source_20_Text"><text:span text:style-name="T7">HLT</text:span></text:span></text:p>
          </table:table-cell>
          <table:table-cell table:style-name="Table7.A2" office:value-type="string">
            <text:p text:style-name="P26">None</text:p>
          </table:table-cell>
          <table:table-cell table:style-name="Table7.A2" office:value-type="string">
            <text:p text:style-name="P26">Halt</text:p>
          </table:table-cell>
          <table:table-cell table:style-name="Table7.A2" office:value-type="string">
            <text:p text:style-name="P26">Halts the core clock.</text:p>
          </table:table-cell>
          <table:table-cell table:style-name="Table7.A2" office:value-type="string">
            <text:p text:style-name="P29">- , -</text:p>
          </table:table-cell>
          <table:table-cell table:style-name="Table7.A2" office:value-type="string">
            <text:p text:style-name="P26">1</text:p>
          </table:table-cell>
          <table:table-cell table:style-name="Table7.H2" office:value-type="string">
            <text:p text:style-name="P26">3</text:p>
          </table:table-cell>
        </table:table-row>
        <table:table-row table:style-name="Table7.1">
          <table:table-cell table:style-name="Table7.A2" office:value-type="string">
            <text:p text:style-name="P27"><text:span text:style-name="Source_20_Text"><text:span text:style-name="T5">0000 0001</text:span></text:span></text:p>
          </table:table-cell>
          <table:table-cell table:style-name="Table7.A2" office:value-type="string">
            <text:p text:style-name="P30"><text:span text:style-name="Source_20_Text"><text:span text:style-name="T8">NOP</text:span></text:span></text:p>
          </table:table-cell>
          <table:table-cell table:style-name="Table7.A2" office:value-type="string">
            <text:p text:style-name="P26">None</text:p>
          </table:table-cell>
          <table:table-cell table:style-name="Table7.A2" office:value-type="string">
            <text:p text:style-name="P31">Nop</text:p>
          </table:table-cell>
          <table:table-cell table:style-name="Table7.A2" office:value-type="string">
            <text:p text:style-name="P31">No operation.</text:p>
          </table:table-cell>
          <table:table-cell table:style-name="Table7.A2" office:value-type="string">
            <text:p text:style-name="P29">-, -</text:p>
          </table:table-cell>
          <table:table-cell table:style-name="Table7.A2" office:value-type="string">
            <text:p text:style-name="P31">1</text:p>
          </table:table-cell>
          <table:table-cell table:style-name="Table7.H2" office:value-type="string">
            <text:p text:style-name="P31">3</text:p>
          </table:table-cell>
        </table:table-row>
        <table:table-row>
          <table:table-cell table:style-name="Table7.A2" office:value-type="string">
            <text:p text:style-name="P27"><text:span text:style-name="Source_20_Text"><text:span text:style-name="T5">0000 0010</text:span></text:span></text:p>
          </table:table-cell>
          <table:table-cell table:style-name="Table7.A2" office:value-type="string">
            <text:p text:style-name="P30"><text:span text:style-name="Source_20_Text"><text:span text:style-name="T8">CLC</text:span></text:span></text:p>
          </table:table-cell>
          <table:table-cell table:style-name="Table7.A2" office:value-type="string">
            <text:p text:style-name="P26">None</text:p>
          </table:table-cell>
          <table:table-cell table:style-name="Table7.A2" office:value-type="string">
            <text:p text:style-name="P32">C ← 0</text:p>
          </table:table-cell>
          <table:table-cell table:style-name="Table7.A2" office:value-type="string">
            <text:p text:style-name="P33">Clear Carry status flag.</text:p>
          </table:table-cell>
          <table:table-cell table:style-name="Table7.A2" office:value-type="string">
            <text:p text:style-name="P29">-, <text:span text:style-name="T12">0</text:span></text:p>
          </table:table-cell>
          <table:table-cell table:style-name="Table7.A2" office:value-type="string">
            <text:p text:style-name="P31">1</text:p>
          </table:table-cell>
          <table:table-cell table:style-name="Table7.H2" office:value-type="string">
            <text:p text:style-name="P31">3</text:p>
          </table:table-cell>
        </table:table-row>
        <table:table-row>
          <table:table-cell table:style-name="Table7.A2" office:value-type="string">
            <text:p text:style-name="P27"><text:span text:style-name="Source_20_Text"><text:span text:style-name="T5">0000 0011</text:span></text:span></text:p>
          </table:table-cell>
          <table:table-cell table:style-name="Table7.A2" office:value-type="string">
            <text:p text:style-name="P30"><text:span text:style-name="Source_20_Text"><text:span text:style-name="T8">SEC</text:span></text:span></text:p>
          </table:table-cell>
          <table:table-cell table:style-name="Table7.A2" office:value-type="string">
            <text:p text:style-name="P26">None</text:p>
          </table:table-cell>
          <table:table-cell table:style-name="Table7.A2" office:value-type="string">
            <text:p text:style-name="P32">C ← 1</text:p>
          </table:table-cell>
          <table:table-cell table:style-name="Table7.A2" office:value-type="string">
            <text:p text:style-name="P33">Set Carry status flag.</text:p>
          </table:table-cell>
          <table:table-cell table:style-name="Table7.A2" office:value-type="string">
            <text:p text:style-name="P29">-, <text:span text:style-name="T12">1</text:span></text:p>
          </table:table-cell>
          <table:table-cell table:style-name="Table7.A2" office:value-type="string">
            <text:p text:style-name="P31">1</text:p>
          </table:table-cell>
          <table:table-cell table:style-name="Table7.H2" office:value-type="string">
            <text:p text:style-name="P31">3</text:p>
          </table:table-cell>
        </table:table-row>
        <table:table-row>
          <table:table-cell table:style-name="Table7.A2" office:value-type="string">
            <text:p text:style-name="P34"><text:span text:style-name="Source_20_Text"><text:span text:style-name="T13">W1:</text:span></text:span></text:p>
            <text:p text:style-name="P34"><text:span text:style-name="Source_20_Text"><text:span text:style-name="T13">0100 0000</text:span></text:span></text:p>
            <text:p text:style-name="P34"><text:span text:style-name="Source_20_Text"><text:span text:style-name="T13">W2:</text:span></text:span></text:p>
            <text:p text:style-name="P34"><text:span text:style-name="Source_20_Text"><text:span text:style-name="T13">AAAA AAAA </text:span></text:span></text:p>
          </table:table-cell>
          <table:table-cell table:style-name="Table7.A2" office:value-type="string">
            <text:p text:style-name="P35"><text:span text:style-name="Source_20_Text"><text:span text:style-name="T14">JMP</text:span></text:span></text:p>
          </table:table-cell>
          <table:table-cell table:style-name="Table7.A2" office:value-type="string">
            <text:p text:style-name="P32">Imm8</text:p>
          </table:table-cell>
          <table:table-cell table:style-name="Table7.A2" office:value-type="string">
            <text:p text:style-name="P32">PC ← Imm8</text:p>
          </table:table-cell>
          <table:table-cell table:style-name="Table7.A2" office:value-type="string">
            <text:p text:style-name="P32">Unconditional jump to address in W2.</text:p>
          </table:table-cell>
          <table:table-cell table:style-name="Table7.A2" office:value-type="string">
            <text:p text:style-name="P29">-, -</text:p>
          </table:table-cell>
          <table:table-cell table:style-name="Table7.A2" office:value-type="string">
            <text:p text:style-name="P32">2</text:p>
          </table:table-cell>
          <table:table-cell table:style-name="Table7.H2" office:value-type="string">
            <text:p text:style-name="P32">3</text:p>
          </table:table-cell>
        </table:table-row>
        <table:table-row table:style-name="Table7.1">
          <table:table-cell table:style-name="Table7.A2" office:value-type="string">
            <text:p text:style-name="P34"><text:span text:style-name="Source_20_Text"><text:span text:style-name="T13">W1:</text:span></text:span></text:p>
            <text:p text:style-name="P34"><text:span text:style-name="Source_20_Text"><text:span text:style-name="T13">0100 0001</text:span></text:span></text:p>
            <text:p text:style-name="P34"><text:span text:style-name="Source_20_Text"><text:span text:style-name="T13">W2:</text:span></text:span></text:p>
            <text:p text:style-name="P34"><text:span text:style-name="Source_20_Text"><text:span text:style-name="T13">AAAA AAAA </text:span></text:span></text:p>
          </table:table-cell>
          <table:table-cell table:style-name="Table7.A2" office:value-type="string">
            <text:p text:style-name="P35"><text:span text:style-name="Source_20_Text"><text:span text:style-name="T14">JEQ</text:span></text:span></text:p>
          </table:table-cell>
          <table:table-cell table:style-name="Table7.A2" office:value-type="string">
            <text:p text:style-name="P32">Imm8</text:p>
          </table:table-cell>
          <table:table-cell table:style-name="Table7.A2" office:value-type="string">
            <text:p text:style-name="P36">If <text:span text:style-name="T15">(</text:span><text:span text:style-name="T16">Z = 1, C = 0</text:span><text:span text:style-name="T15">):</text:span></text:p>
            <text:p text:style-name="P36">PC ← Imm8</text:p>
          </table:table-cell>
          <table:table-cell table:style-name="Table7.A2" office:value-type="string">
            <text:p text:style-name="P37">Jumps to address in W2 if Equal condition is met. (Note: Use CMP prior to branching to update flags).</text:p>
          </table:table-cell>
          <table:table-cell table:style-name="Table7.A2" office:value-type="string">
            <text:p text:style-name="P34">-, -</text:p>
          </table:table-cell>
          <table:table-cell table:style-name="Table7.A2" office:value-type="string">
            <text:p text:style-name="P32">2</text:p>
          </table:table-cell>
          <table:table-cell table:style-name="Table7.H2" office:value-type="string">
            <text:p text:style-name="P32">3</text:p>
          </table:table-cell>
        </table:table-row>
        <table:table-row table:style-name="Table7.1">
          <table:table-cell table:style-name="Table7.A2" office:value-type="string">
            <text:p text:style-name="P34"><text:span text:style-name="Source_20_Text"><text:span text:style-name="T13">W1:</text:span></text:span></text:p>
            <text:p text:style-name="P34"><text:span text:style-name="Source_20_Text"><text:span text:style-name="T13">0100 0010</text:span></text:span></text:p>
            <text:p text:style-name="P34"><text:span text:style-name="Source_20_Text"><text:span text:style-name="T13">W2:</text:span></text:span></text:p>
            <text:p text:style-name="P34"><text:span text:style-name="Source_20_Text"><text:span text:style-name="T13">AAAA AAAA </text:span></text:span></text:p>
          </table:table-cell>
          <table:table-cell table:style-name="Table7.A2" office:value-type="string">
            <text:p text:style-name="P35"><text:span text:style-name="Source_20_Text"><text:span text:style-name="T14">JLT</text:span></text:span></text:p>
          </table:table-cell>
          <table:table-cell table:style-name="Table7.A2" office:value-type="string">
            <text:p text:style-name="P32">Imm8</text:p>
          </table:table-cell>
          <table:table-cell table:style-name="Table7.A2" office:value-type="string">
            <text:p text:style-name="P36">If <text:span text:style-name="T15">(</text:span><text:span text:style-name="T16">Z = </text:span>0<text:span text:style-name="T16">, C = 0</text:span><text:span text:style-name="T15">):</text:span></text:p>
            <text:p text:style-name="P36">PC ← Imm8</text:p>
          </table:table-cell>
          <table:table-cell table:style-name="Table7.A2" office:value-type="string">
            <text:p text:style-name="P37">Jumps to address in W2 if <text:span text:style-name="T11">Less Than</text:span> condition is met. (Note: Use CMP prior to branching to update flags).</text:p>
          </table:table-cell>
          <table:table-cell table:style-name="Table7.A2" office:value-type="string">
            <text:p text:style-name="P34">-, -</text:p>
          </table:table-cell>
          <table:table-cell table:style-name="Table7.A2" office:value-type="string">
            <text:p text:style-name="P32">2</text:p>
          </table:table-cell>
          <table:table-cell table:style-name="Table7.H2" office:value-type="string">
            <text:p text:style-name="P32">3</text:p>
          </table:table-cell>
        </table:table-row>
        <table:table-row table:style-name="Table7.1">
          <table:table-cell table:style-name="Table7.A2" office:value-type="string">
            <text:p text:style-name="P34"><text:span text:style-name="Source_20_Text"><text:span text:style-name="T13">W1:</text:span></text:span></text:p>
            <text:p text:style-name="P34"><text:span text:style-name="Source_20_Text"><text:span text:style-name="T13">0100 0011</text:span></text:span></text:p>
            <text:p text:style-name="P34"><text:span text:style-name="Source_20_Text"><text:span text:style-name="T13">W2:</text:span></text:span></text:p>
            <text:p text:style-name="P34"><text:span text:style-name="Source_20_Text"><text:span text:style-name="T13">AAAA AAAA </text:span></text:span></text:p>
          </table:table-cell>
          <table:table-cell table:style-name="Table7.A2" office:value-type="string">
            <text:p text:style-name="P35"><text:span text:style-name="Source_20_Text"><text:span text:style-name="T14">JGT</text:span></text:span></text:p>
          </table:table-cell>
          <table:table-cell table:style-name="Table7.A2" office:value-type="string">
            <text:p text:style-name="P32">Imm8</text:p>
          </table:table-cell>
          <table:table-cell table:style-name="Table7.A2" office:value-type="string">
            <text:p text:style-name="P36">If <text:span text:style-name="T15">(</text:span><text:span text:style-name="T16">Z = </text:span>0<text:span text:style-name="T16">, C = </text:span>1<text:span text:style-name="T15">):</text:span></text:p>
            <text:p text:style-name="P36">PC ← Imm8</text:p>
          </table:table-cell>
          <table:table-cell table:style-name="Table7.A2" office:value-type="string">
            <text:p text:style-name="P37">Jumps to address in W2 if <text:span text:style-name="T11">Greater Than</text:span> condition is met. (Note: Use CMP prior to branching to update flags).</text:p>
          </table:table-cell>
          <table:table-cell table:style-name="Table7.A2" office:value-type="string">
            <text:p text:style-name="P34">-, -</text:p>
          </table:table-cell>
          <table:table-cell table:style-name="Table7.A2" office:value-type="string">
            <text:p text:style-name="P32">2</text:p>
          </table:table-cell>
          <table:table-cell table:style-name="Table7.H2" office:value-type="string">
            <text:p text:style-name="P32">3</text:p>
          </table:table-cell>
        </table:table-row>
      </table:table>
      <text:h text:style-name="P38" text:outline-level="2"/>
      <text:h text:style-name="P39" text:outline-level="3"><text:bookmark-start text:name="__RefHeading___Toc4068_1996774639"/><text:span text:style-name="T13">Format B </text:span><text:span text:style-name="T9">I</text:span><text:span text:style-name="T13">nstructions</text:span><text:bookmark-end text:name="__RefHeading___Toc4068_1996774639"/></text:h>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office:value-type="string">
            <text:p text:style-name="P40">Encoding [7:0]</text:p>
          </table:table-cell>
          <table:table-cell table:style-name="Table8.A1" office:value-type="string">
            <text:p text:style-name="P40">Mnemonic</text:p>
          </table:table-cell>
          <table:table-cell table:style-name="Table8.A1" office:value-type="string">
            <text:p text:style-name="P40">Operands</text:p>
          </table:table-cell>
          <table:table-cell table:style-name="Table8.A1" office:value-type="string">
            <text:p text:style-name="P40">Operation</text:p>
          </table:table-cell>
          <table:table-cell table:style-name="Table8.A1" office:value-type="string">
            <text:p text:style-name="P40">Description</text:p>
          </table:table-cell>
          <table:table-cell table:style-name="Table8.A1" office:value-type="string">
            <text:p text:style-name="P40">Flags (Z, C)</text:p>
          </table:table-cell>
          <table:table-cell table:style-name="Table8.A1" office:value-type="string">
            <text:p text:style-name="P40">Size (Words)</text:p>
          </table:table-cell>
          <table:table-cell table:style-name="Table8.H1" office:value-type="string">
            <text:p text:style-name="P40">Cycles</text:p>
          </table:table-cell>
        </table:table-row>
        <table:table-row table:style-name="Table8.1">
          <table:table-cell table:style-name="Table8.A2" office:value-type="string">
            <text:p text:style-name="P41"><text:span text:style-name="Source_20_Text"><text:span text:style-name="T9">0000 01RB</text:span></text:span></text:p>
          </table:table-cell>
          <table:table-cell table:style-name="Table8.A2" office:value-type="string">
            <text:p text:style-name="P35"><text:span text:style-name="Source_20_Text"><text:span text:style-name="T14">SHL</text:span></text:span></text:p>
          </table:table-cell>
          <table:table-cell table:style-name="Table8.A2" office:value-type="string">
            <text:p text:style-name="P32">RB</text:p>
          </table:table-cell>
          <table:table-cell table:style-name="Table8.A2" office:value-type="string">
            <text:p text:style-name="P42">RB ← RB &lt;&lt; 1</text:p>
          </table:table-cell>
          <table:table-cell table:style-name="Table8.A2" office:value-type="string">
            <text:p text:style-name="P43">Logical left shift by 1. </text:p>
          </table:table-cell>
          <table:table-cell table:style-name="Table8.A2" office:value-type="string">
            <text:p text:style-name="P32">*, *</text:p>
          </table:table-cell>
          <table:table-cell table:style-name="Table8.A2" office:value-type="string">
            <text:p text:style-name="P44">1</text:p>
          </table:table-cell>
          <table:table-cell table:style-name="Table8.H2" office:value-type="string">
            <text:p text:style-name="P44">4</text:p>
          </table:table-cell>
        </table:table-row>
        <table:table-row table:style-name="Table8.1">
          <table:table-cell table:style-name="Table8.A2" office:value-type="string">
            <text:p text:style-name="P41"><text:span text:style-name="Source_20_Text"><text:span text:style-name="T9">0000 10RB</text:span></text:span></text:p>
          </table:table-cell>
          <table:table-cell table:style-name="Table8.A2" office:value-type="string">
            <text:p text:style-name="P35"><text:span text:style-name="Source_20_Text"><text:span text:style-name="T14">SHR</text:span></text:span></text:p>
          </table:table-cell>
          <table:table-cell table:style-name="Table8.A2" office:value-type="string">
            <text:p text:style-name="P32">RB</text:p>
          </table:table-cell>
          <table:table-cell table:style-name="Table8.A2" office:value-type="string">
            <text:p text:style-name="P42">RB ← RB &gt;&gt; 1</text:p>
          </table:table-cell>
          <table:table-cell table:style-name="Table8.A2" office:value-type="string">
            <text:p text:style-name="P43">Logical right shift by 1. </text:p>
          </table:table-cell>
          <table:table-cell table:style-name="Table8.A2" office:value-type="string">
            <text:p text:style-name="P32">*, *</text:p>
          </table:table-cell>
          <table:table-cell table:style-name="Table8.A2" office:value-type="string">
            <text:p text:style-name="P44">1</text:p>
          </table:table-cell>
          <table:table-cell table:style-name="Table8.H2" office:value-type="string">
            <text:p text:style-name="P44">4</text:p>
          </table:table-cell>
        </table:table-row>
        <table:table-row table:style-name="Table8.1">
          <table:table-cell table:style-name="Table8.A2" office:value-type="string">
            <text:p text:style-name="P41"><text:span text:style-name="Source_20_Text"><text:span text:style-name="T9">0000 11RB</text:span></text:span></text:p>
          </table:table-cell>
          <table:table-cell table:style-name="Table8.A2" office:value-type="string">
            <text:p text:style-name="P35"><text:span text:style-name="Source_20_Text"><text:span text:style-name="T14">NOT</text:span></text:span></text:p>
          </table:table-cell>
          <table:table-cell table:style-name="Table8.A2" office:value-type="string">
            <text:p text:style-name="P32">RB</text:p>
          </table:table-cell>
          <table:table-cell table:style-name="Table8.A2" office:value-type="string">
            <text:p text:style-name="P45"><text:span text:style-name="T17">RB ← </text:span>¬<text:span text:style-name="T17">RB</text:span></text:p>
          </table:table-cell>
          <table:table-cell table:style-name="Table8.A2" office:value-type="string">
            <text:p text:style-name="P42">Negation of RB. </text:p>
          </table:table-cell>
          <table:table-cell table:style-name="Table8.A2" office:value-type="string">
            <text:p text:style-name="P32">*, *</text:p>
          </table:table-cell>
          <table:table-cell table:style-name="Table8.A2" office:value-type="string">
            <text:p text:style-name="P44">1</text:p>
          </table:table-cell>
          <table:table-cell table:style-name="Table8.H2" office:value-type="string">
            <text:p text:style-name="P44">4</text:p>
          </table:table-cell>
        </table:table-row>
        <table:table-row table:style-name="Table8.1">
          <table:table-cell table:style-name="Table8.A2" office:value-type="string">
            <text:p text:style-name="P41"><text:span text:style-name="Source_20_Text"><text:span text:style-name="T9">0001 00RB</text:span></text:span></text:p>
          </table:table-cell>
          <table:table-cell table:style-name="Table8.A2" office:value-type="string">
            <text:p text:style-name="P35"><text:span text:style-name="Source_20_Text"><text:span text:style-name="T14">INC</text:span></text:span></text:p>
          </table:table-cell>
          <table:table-cell table:style-name="Table8.A2" office:value-type="string">
            <text:p text:style-name="P32">RB</text:p>
          </table:table-cell>
          <table:table-cell table:style-name="Table8.A2" office:value-type="string">
            <text:p text:style-name="P42">RB ← RB + 1</text:p>
          </table:table-cell>
          <table:table-cell table:style-name="Table8.A2" office:value-type="string">
            <text:p text:style-name="P42">Increment by <text:span text:style-name="T9">1.</text:span></text:p>
          </table:table-cell>
          <table:table-cell table:style-name="Table8.A2" office:value-type="string">
            <text:p text:style-name="P46">-, -</text:p>
          </table:table-cell>
          <table:table-cell table:style-name="Table8.A2" office:value-type="string">
            <text:p text:style-name="P44">1</text:p>
          </table:table-cell>
          <table:table-cell table:style-name="Table8.H2" office:value-type="string">
            <text:p text:style-name="P44">4</text:p>
          </table:table-cell>
        </table:table-row>
        <table:table-row table:style-name="Table8.1">
          <table:table-cell table:style-name="Table8.A2" office:value-type="string">
            <text:p text:style-name="P41"><text:span text:style-name="Source_20_Text"><text:span text:style-name="T9">0001 01RB</text:span></text:span></text:p>
          </table:table-cell>
          <table:table-cell table:style-name="Table8.A2" office:value-type="string">
            <text:p text:style-name="P35"><text:span text:style-name="Source_20_Text"><text:span text:style-name="T14">DEC</text:span></text:span></text:p>
          </table:table-cell>
          <table:table-cell table:style-name="Table8.A2" office:value-type="string">
            <text:p text:style-name="P32">RB</text:p>
          </table:table-cell>
          <table:table-cell table:style-name="Table8.A2" office:value-type="string">
            <text:p text:style-name="P42">RB ← RB - 1</text:p>
          </table:table-cell>
          <table:table-cell table:style-name="Table8.A2" office:value-type="string">
            <text:p text:style-name="P42">Decrement by 1.</text:p>
          </table:table-cell>
          <table:table-cell table:style-name="Table8.A2" office:value-type="string">
            <text:p text:style-name="P46">-, -</text:p>
          </table:table-cell>
          <table:table-cell table:style-name="Table8.A2" office:value-type="string">
            <text:p text:style-name="P44">1</text:p>
          </table:table-cell>
          <table:table-cell table:style-name="Table8.H2" office:value-type="string">
            <text:p text:style-name="P44">4</text:p>
          </table:table-cell>
        </table:table-row>
      </table:table>
      <text:p text:style-name="P47"/>
      <text:h text:style-name="P48" text:outline-level="3"><text:bookmark-start text:name="__RefHeading___Toc4070_1996774639"/>Format C Instructions<text:bookmark-end text:name="__RefHeading___Toc4070_1996774639"/></text:h>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style-name="Table9.1">
          <table:table-cell table:style-name="Table9.A1" office:value-type="string">
            <text:p text:style-name="P49">Encoding [7:0]</text:p>
          </table:table-cell>
          <table:table-cell table:style-name="Table9.A1" office:value-type="string">
            <text:p text:style-name="P49">Mnemonic</text:p>
          </table:table-cell>
          <table:table-cell table:style-name="Table9.A1" office:value-type="string">
            <text:p text:style-name="P49">Operands</text:p>
          </table:table-cell>
          <table:table-cell table:style-name="Table9.A1" office:value-type="string">
            <text:p text:style-name="P49">Operation</text:p>
          </table:table-cell>
          <table:table-cell table:style-name="Table9.A1" office:value-type="string">
            <text:p text:style-name="P49">Description</text:p>
          </table:table-cell>
          <table:table-cell table:style-name="Table9.A1" office:value-type="string">
            <text:p text:style-name="P49">Flags (Z, C)</text:p>
          </table:table-cell>
          <table:table-cell table:style-name="Table9.A1" office:value-type="string">
            <text:p text:style-name="P49">Size (Words)</text:p>
          </table:table-cell>
          <table:table-cell table:style-name="Table9.H1" office:value-type="string">
            <text:p text:style-name="P49">Cycles</text:p>
          </table:table-cell>
        </table:table-row>
        <table:table-row table:style-name="Table9.1">
          <table:table-cell table:style-name="Table9.A2" office:value-type="string">
            <text:p text:style-name="P41"><text:span text:style-name="Source_20_Text"><text:span text:style-name="T9">0010 RARB</text:span></text:span></text:p>
          </table:table-cell>
          <table:table-cell table:style-name="Table9.A2" office:value-type="string">
            <text:p text:style-name="P35"><text:span text:style-name="Source_20_Text"><text:span text:style-name="T14">CMP</text:span></text:span></text:p>
          </table:table-cell>
          <table:table-cell table:style-name="Table9.A2" office:value-type="string">
            <text:p text:style-name="P44">RA, RB</text:p>
          </table:table-cell>
          <table:table-cell table:style-name="Table9.A2" office:value-type="string">
            <text:p text:style-name="P50"><text:span text:style-name="T9">Flags</text:span> ← </text:p>
            <text:p text:style-name="P50">Status(RA - RB)</text:p>
          </table:table-cell>
          <table:table-cell table:style-name="Table9.A2" office:value-type="string">
            <text:p text:style-name="P51"><text:span text:style-name="T18">Compare RA with RB, Performs RA - RB </text:span><text:span text:style-name="T9">internally with no save.</text:span></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4</text:p>
          </table:table-cell>
        </table:table-row>
        <table:table-row table:style-name="Table9.1">
          <table:table-cell table:style-name="Table9.A2" office:value-type="string">
            <text:p text:style-name="P41"><text:span text:style-name="Source_20_Text"><text:span text:style-name="T9">0011 RARB</text:span></text:span></text:p>
          </table:table-cell>
          <table:table-cell table:style-name="Table9.A2" office:value-type="string">
            <text:p text:style-name="P35"><text:span text:style-name="Source_20_Text"><text:span text:style-name="T14">SUB</text:span></text:span></text:p>
          </table:table-cell>
          <table:table-cell table:style-name="Table9.A2" office:value-type="string">
            <text:p text:style-name="P44">RA, RB</text:p>
          </table:table-cell>
          <table:table-cell table:style-name="Table9.A2" office:value-type="string">
            <text:p text:style-name="P42">RA ← RA - RB</text:p>
          </table:table-cell>
          <table:table-cell table:style-name="Table9.A2" office:value-type="string">
            <text:p text:style-name="P52">Subtraction <text:span text:style-name="T19">without</text:span> borrow.</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41"><text:span text:style-name="Source_20_Text"><text:span text:style-name="T9">1000 RARB</text:span></text:span></text:p>
          </table:table-cell>
          <table:table-cell table:style-name="Table9.A2" office:value-type="string">
            <text:p text:style-name="P35"><text:span text:style-name="Source_20_Text"><text:span text:style-name="T14">ADC</text:span></text:span></text:p>
          </table:table-cell>
          <table:table-cell table:style-name="Table9.A2" office:value-type="string">
            <text:p text:style-name="P44">RA, RB</text:p>
          </table:table-cell>
          <table:table-cell table:style-name="Table9.A2" office:value-type="string">
            <text:p text:style-name="P53">RA ← RA + RB <text:span text:style-name="T20">+ C</text:span></text:p>
          </table:table-cell>
          <table:table-cell table:style-name="Table9.A2" office:value-type="string">
            <text:p text:style-name="P53">A<text:span text:style-name="T9">ddition with carry.</text:span></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41"><text:span text:style-name="Source_20_Text"><text:span text:style-name="T9">1001 RARB</text:span></text:span></text:p>
          </table:table-cell>
          <table:table-cell table:style-name="Table9.A2" office:value-type="string">
            <text:p text:style-name="P35"><text:span text:style-name="Source_20_Text"><text:span text:style-name="T14">ORR</text:span></text:span></text:p>
          </table:table-cell>
          <table:table-cell table:style-name="Table9.A2" office:value-type="string">
            <text:p text:style-name="P44">RA, RB</text:p>
          </table:table-cell>
          <table:table-cell table:style-name="Table9.A2" office:value-type="string">
            <text:p text:style-name="P53">RA ← RA ∨ RB</text:p>
          </table:table-cell>
          <table:table-cell table:style-name="Table9.A2" office:value-type="string">
            <text:p text:style-name="P53">Logical OR. </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41"><text:span text:style-name="Source_20_Text"><text:span text:style-name="T9">1010 RARB</text:span></text:span></text:p>
          </table:table-cell>
          <table:table-cell table:style-name="Table9.A2" office:value-type="string">
            <text:p text:style-name="P35"><text:span text:style-name="Source_20_Text"><text:span text:style-name="T14">AND</text:span></text:span></text:p>
          </table:table-cell>
          <table:table-cell table:style-name="Table9.A2" office:value-type="string">
            <text:p text:style-name="P44">RA, RB</text:p>
          </table:table-cell>
          <table:table-cell table:style-name="Table9.A2" office:value-type="string">
            <text:p text:style-name="P53">RA ← RA ∧ RB</text:p>
          </table:table-cell>
          <table:table-cell table:style-name="Table9.A2" office:value-type="string">
            <text:p text:style-name="P53">Logical AND.</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41"><text:span text:style-name="Source_20_Text"><text:span text:style-name="T9">1011 RARB</text:span></text:span></text:p>
          </table:table-cell>
          <table:table-cell table:style-name="Table9.A2" office:value-type="string">
            <text:p text:style-name="P35"><text:span text:style-name="Source_20_Text"><text:span text:style-name="T14">XOR</text:span></text:span></text:p>
          </table:table-cell>
          <table:table-cell table:style-name="Table9.A2" office:value-type="string">
            <text:p text:style-name="P44">RA, RB</text:p>
          </table:table-cell>
          <table:table-cell table:style-name="Table9.A2" office:value-type="string">
            <text:p text:style-name="P53">RA ← RA ⊕ RB</text:p>
          </table:table-cell>
          <table:table-cell table:style-name="Table9.A2" office:value-type="string">
            <text:p text:style-name="P53">Logical XOR.</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54"><text:span text:style-name="Source_20_Text"><text:span text:style-name="T9">1</text:span></text:span><text:span text:style-name="Source_20_Text"><text:span text:style-name="T11">100</text:span></text:span><text:span text:style-name="Source_20_Text"><text:span text:style-name="T9"> RARB</text:span></text:span></text:p>
          </table:table-cell>
          <table:table-cell table:style-name="Table9.A2" office:value-type="string">
            <text:p text:style-name="P35"><text:span text:style-name="Source_20_Text"><text:span text:style-name="T14">LDM</text:span></text:span></text:p>
          </table:table-cell>
          <table:table-cell table:style-name="Table9.A2" office:value-type="string">
            <text:p text:style-name="P44">RA, RB</text:p>
          </table:table-cell>
          <table:table-cell table:style-name="Table9.A2" office:value-type="string">
            <text:p text:style-name="P55">RA ← M[RB]</text:p>
          </table:table-cell>
          <table:table-cell table:style-name="Table9.A2" office:value-type="string">
            <text:p text:style-name="P55">Memory indirect load</text:p>
          </table:table-cell>
          <table:table-cell table:style-name="Table9.A2" office:value-type="string">
            <text:p text:style-name="P46">-, -</text:p>
          </table:table-cell>
          <table:table-cell table:style-name="Table9.A2" office:value-type="string">
            <text:p text:style-name="P56">1</text:p>
          </table:table-cell>
          <table:table-cell table:style-name="Table9.H2" office:value-type="string">
            <text:p text:style-name="P56">4</text:p>
          </table:table-cell>
        </table:table-row>
        <table:table-row table:style-name="Table9.1">
          <table:table-cell table:style-name="Table9.A2" office:value-type="string">
            <text:p text:style-name="P54"><text:span text:style-name="Source_20_Text"><text:span text:style-name="T9">1</text:span></text:span><text:span text:style-name="Source_20_Text"><text:span text:style-name="T11">101</text:span></text:span><text:span text:style-name="Source_20_Text"><text:span text:style-name="T9"> RARB</text:span></text:span></text:p>
          </table:table-cell>
          <table:table-cell table:style-name="Table9.A2" office:value-type="string">
            <text:p text:style-name="P35"><text:span text:style-name="Source_20_Text"><text:span text:style-name="T14">STM</text:span></text:span></text:p>
          </table:table-cell>
          <table:table-cell table:style-name="Table9.A2" office:value-type="string">
            <text:p text:style-name="P44">RA, RB</text:p>
          </table:table-cell>
          <table:table-cell table:style-name="Table9.A2" office:value-type="string">
            <text:p text:style-name="P55">M[RB] ← RA</text:p>
          </table:table-cell>
          <table:table-cell table:style-name="Table9.A2" office:value-type="string">
            <text:p text:style-name="P55">Memory indirect store</text:p>
          </table:table-cell>
          <table:table-cell table:style-name="Table9.A2" office:value-type="string">
            <text:p text:style-name="P46">-, -</text:p>
          </table:table-cell>
          <table:table-cell table:style-name="Table9.A2" office:value-type="string">
            <text:p text:style-name="P56">1</text:p>
          </table:table-cell>
          <table:table-cell table:style-name="Table9.H2" office:value-type="string">
            <text:p text:style-name="P56">4</text:p>
          </table:table-cell>
        </table:table-row>
        <table:table-row table:style-name="Table9.1">
          <table:table-cell table:style-name="Table9.A2" office:value-type="string">
            <text:p text:style-name="P54"><text:span text:style-name="Source_20_Text"><text:span text:style-name="T9">1</text:span></text:span><text:span text:style-name="Source_20_Text"><text:span text:style-name="T11">1</text:span></text:span><text:span text:style-name="Source_20_Text"><text:span text:style-name="T9">1</text:span></text:span><text:span text:style-name="Source_20_Text"><text:span text:style-name="T11">0</text:span></text:span><text:span text:style-name="Source_20_Text"><text:span text:style-name="T9"> RARB</text:span></text:span></text:p>
          </table:table-cell>
          <table:table-cell table:style-name="Table9.A2" office:value-type="string">
            <text:p text:style-name="P57"><text:span text:style-name="Source_20_Text"><text:span text:style-name="T7">MOV</text:span></text:span></text:p>
          </table:table-cell>
          <table:table-cell table:style-name="Table9.A2" office:value-type="string">
            <text:p text:style-name="P56">RA, RB</text:p>
          </table:table-cell>
          <table:table-cell table:style-name="Table9.A2" office:value-type="string">
            <text:p text:style-name="P55">RA ← RB</text:p>
          </table:table-cell>
          <table:table-cell table:style-name="Table9.A2" office:value-type="string">
            <text:p text:style-name="P58">Copy value of RB into RA</text:p>
          </table:table-cell>
          <table:table-cell table:style-name="Table9.A2" office:value-type="string">
            <text:p text:style-name="P46">-, -</text:p>
          </table:table-cell>
          <table:table-cell table:style-name="Table9.A2" office:value-type="string">
            <text:p text:style-name="P56">1</text:p>
          </table:table-cell>
          <table:table-cell table:style-name="Table9.H2" office:value-type="string">
            <text:p text:style-name="P56">3</text:p>
          </table:table-cell>
        </table:table-row>
        <table:table-row table:style-name="Table9.11">
          <table:table-cell table:style-name="Table9.A2" office:value-type="string">
            <text:p text:style-name="P54"><text:span text:style-name="Source_20_Text"><text:span text:style-name="T11">W1:</text:span></text:span></text:p>
            <text:p text:style-name="P54"><text:span text:style-name="Source_20_Text"><text:span text:style-name="T9">1</text:span></text:span><text:span text:style-name="Source_20_Text"><text:span text:style-name="T11">1</text:span></text:span><text:span text:style-name="Source_20_Text"><text:span text:style-name="T9">11 RA</text:span></text:span><text:span text:style-name="Source_20_Text"><text:span text:style-name="T11">XX</text:span></text:span></text:p>
            <text:p text:style-name="P54"><text:span text:style-name="Source_20_Text"><text:span text:style-name="T11">W2:</text:span></text:span></text:p>
            <text:p text:style-name="P54"><text:span text:style-name="Source_20_Text"><text:span text:style-name="T11">VVVV VVVV</text:span></text:span></text:p>
          </table:table-cell>
          <table:table-cell table:style-name="Table9.A2" office:value-type="string">
            <text:p text:style-name="P35"><text:span text:style-name="Source_20_Text"><text:span text:style-name="T14">LDI</text:span></text:span></text:p>
          </table:table-cell>
          <table:table-cell table:style-name="Table9.A2" office:value-type="string">
            <text:p text:style-name="P56">RA, Imm8</text:p>
          </table:table-cell>
          <table:table-cell table:style-name="Table9.A2" office:value-type="string">
            <text:p text:style-name="P55">RA ← Imm8</text:p>
          </table:table-cell>
          <table:table-cell table:style-name="Table9.A2" office:value-type="string">
            <text:p text:style-name="P55">Set RA to the value stored in the next word.</text:p>
          </table:table-cell>
          <table:table-cell table:style-name="Table9.A2" office:value-type="string">
            <text:p text:style-name="P46">-, -</text:p>
          </table:table-cell>
          <table:table-cell table:style-name="Table9.A2" office:value-type="string">
            <text:p text:style-name="P56">2</text:p>
          </table:table-cell>
          <table:table-cell table:style-name="Table9.H2" office:value-type="string">
            <text:p text:style-name="P56">4</text:p>
          </table:table-cell>
        </table:table-row>
      </table:table>
      <text:p text:style-name="P59"/>
      <text:h text:style-name="P60" text:outline-level="1"><text:bookmark-start text:name="__RefHeading___Toc1101_1575828878"/><text:span text:style-name="T1">I</text:span>SA <text:span text:style-name="T4">Design Decisions</text:span><text:bookmark-end text:name="__RefHeading___Toc1101_1575828878"/></text:h>
      <text:h text:style-name="P61" text:outline-level="2"><text:bookmark-start text:name="__RefHeading___Toc1103_1575828878"/>Architectural Scope<text:bookmark-end text:name="__RefHeading___Toc1103_1575828878"/></text:h>
      <text:p text:style-name="P62">The ALP8B was designed with a strict 256 byte Von Neumann memory size. This is due to this project mainly being an education introduction into basic computer architecture and design. If the ALP8B were to have an 16 bit address space of memory, many of the instructions that need to hold an address value (branching &amp; immediate instructions), would be at minimum 3 bytes long. This would <text:span text:style-name="T21">exponentially increase</text:span> hardware <text:span text:style-name="T21">complexity </text:span>and the difficulty of the project. The ISA was not designed with potential expansion for the future in mind due to the ‘tech-demo’ nature of this project.</text:p>
      <text:h text:style-name="P61" text:outline-level="2"><text:bookmark-start text:name="__RefHeading___Toc1105_1575828878"/>ALU Optimisation <text:span text:style-name="T22">&amp; Quirks</text:span><text:bookmark-end text:name="__RefHeading___Toc1105_1575828878"/></text:h>
      <text:p text:style-name="P63"><text:span text:style-name="T23">To simplify hardware implementation of the ISA, the </text:span><text:span text:style-name="Source_20_Text"><text:span text:style-name="T23">SUB</text:span></text:span><text:span text:style-name="T23">, </text:span><text:span text:style-name="Source_20_Text"><text:span text:style-name="T23">CMP</text:span></text:span><text:span text:style-name="T23"> and </text:span><text:span text:style-name="Source_20_Text"><text:span text:style-name="T23">ADC</text:span></text:span><text:span text:style-name="T23"> instruction all use the same 8-bit adder circuitry. </text:span><text:span text:style-name="Source_20_Text"><text:span text:style-name="T23">SUB/CMP </text:span></text:span><text:span text:style-name="T23">were implemented </text:span><text:span text:style-name="T21">via two’s complement inversion</text:span><text:span text:style-name="T23"> </text:span><text:span text:style-name="Source_20_Text"><text:span text:style-name="T23">A + </text:span></text:span><text:span text:style-name="Source_20_Text"><text:span text:style-name="T21">(</text:span></text:span><text:span text:style-name="Source_20_Text"><text:span text:style-name="T24">¬</text:span></text:span><text:span text:style-name="Source_20_Text"><text:span text:style-name="T23">B</text:span></text:span><text:span text:style-name="Source_20_Text"><text:span text:style-name="T21">)</text:span></text:span><text:span text:style-name="Source_20_Text"><text:span text:style-name="T23"> + 1</text:span></text:span><text:span text:style-name="T23">, with the ‘1’ hardwired through the carry in bit to the adder, </text:span><text:span text:style-name="T25">hence why the SUB instruction doesnt consume the carry and isnt ‘</text:span><text:span text:style-name="Source_20_Text"><text:span text:style-name="T25">SBC</text:span></text:span><text:span text:style-name="T25">’</text:span><text:span text:style-name="T23">. </text:span><text:span text:style-name="T15">Additionally, the </text:span><text:span text:style-name="Source_20_Text"><text:span text:style-name="T15">CMP</text:span></text:span><text:span text:style-name="T15"> instruction shares identical wiring as the </text:span><text:span text:style-name="Source_20_Text"><text:span text:style-name="T15">SUB</text:span></text:span><text:span text:style-name="T15"> instruction – the difference in functionality is within the microcode sequence</text:span><text:span text:style-name="T23">. This is once again a choice to reduce </text:span><text:span text:style-name="T15">hardware</text:span><text:span text:style-name="T23"> complexity at the cost of a reduced set of functionality.</text:span></text:p>
      <text:p text:style-name="P64">Due to the limiting size of an 8-bit instruction, ALU operations are spread across both the 00 and 10 block. Although this slightly ruins ISA orthogonality and adds some more logic to the instruction decoder, it was considered a reasonable trade off.</text:p>
      <text:h text:style-name="P65" text:outline-level="2"><text:bookmark-start text:name="__RefHeading___Toc1414_1575828878"/>Branching <text:bookmark-end text:name="__RefHeading___Toc1414_1575828878"/></text:h>
      <text:p text:style-name="P66">As seen in the reference table, all branching instructions are two bytes wide, with the second byte storing the immediate memory address. As mentioned previously, this is simplified by the 256 byte memory space (can be addressed fully by a single byte). <text:span text:style-name="T26">A majority if the inspiration for the branching instructions came from the 6502 architecture.</text:span></text:p>
      <text:p text:style-name="P66">The decision to have a dedicated <text:span text:style-name="Source_20_Text">JGT</text:span>, rather than following the MIPS/RISC-V route of keeping it a pseudo-instruction was made due to the following reasons:</text:p>
      <text:list text:style-name="L4">
        <text:list-item>
          <text:p text:style-name="P67">Increased simplicity of the software assembler</text:p>
        </text:list-item>
        <text:list-item>
          <text:p text:style-name="P67">Greater instruction density, as having a synthesised greater than branch would need to compile into two instructions. </text:p>
        </text:list-item>
        <text:list-item>
          <text:p text:style-name="P67">Limitations due to only having two flags <text:span text:style-name="T26">to identify branching status.</text:span></text:p>
        </text:list-item>
      </text:list>
      <text:p text:style-name="P68">As branching instructions themselves do not complete a comparison, it is recommended that an explicit <text:span text:style-name="Source_20_Text">CMP</text:span> is used before each branch, as to prevent accidental execution of a jump due to stale flags.</text:p>
      <text:h text:style-name="P69" text:outline-level="2"><text:bookmark-start text:name="__RefHeading___Toc1416_1575828878"/>Memory Indirect Addressing<text:bookmark-end text:name="__RefHeading___Toc1416_1575828878"/></text:h>
      <text:p text:style-name="P68">The decision to use memory indirect addressing was made due to limit the amount of costly 2-byte wide instructions, as a immediate addressing instruction would require two bytes width. A 2-byte width would be expensive as <text:span text:style-name="Source_20_Text">LTM</text:span> / <text:span text:style-name="Source_20_Text">STM</text:span> are commonly used instructions. Once again, the 256 memory space is easily addressed by the value inside a single register, hence allowing for simple<text:span text:style-name="T27">r</text:span> hardware.</text:p>
      <text:p text:style-name="P70">This ties into the decision to make the <text:span text:style-name="Source_20_Text">INC</text:span> / <text:span text:style-name="Source_20_Text">DEC</text:span> instructions not affect the condition flags, as these can thus be used to move a “pointer” register around easily to access sequential memory locations without tampering with the flag state<text:span text:style-name="T28">(s)</text:span> used for branching.</text:p>
      <text:h text:style-name="P71" text:outline-level="2"><text:bookmark-start text:name="__RefHeading___Toc1418_1575828878"/>Other <text:span text:style-name="T29">Decisions</text:span><text:bookmark-end text:name="__RefHeading___Toc1418_1575828878"/></text:h>
      <text:list text:style-name="L5">
        <text:list-item>
          <text:p text:style-name="P72"><text:span text:style-name="Source_20_Text">HLT</text:span> is assigned <text:span text:style-name="Source_20_Text">0000 0000</text:span> as a preventative measure to ensure that if execution goes out of bounds, the computer safely stops</text:p>
        </text:list-item>
        <text:list-item>
          <text:p text:style-name="P72">Explicit <text:span text:style-name="Source_20_Text">NOP</text:span> was added rather than <text:span text:style-name="T30">a pseudo implementation via </text:span><text:span text:style-name="Source_20_Text"><text:span text:style-name="T30">MOV RA RA</text:span></text:span><text:span text:style-name="T30"> or similar due to </text:span><text:span text:style-name="T21">unallocated opcode space within the Format A decoding map in the 00 block.</text:span></text:p>
        </text:list-item>
        <text:list-item>
          <text:p text:style-name="P73">The ISA features no stack and no stack related instructions as they were deemed too expensive for a 256 byte memory space. Same reasoning applies for interrupts. </text:p>
        </text:list-item>
      </text:list>
      <text:h text:style-name="P74" text:outline-level="1"><text:bookmark-start text:name="__RefHeading___Toc1997_316657009"/>Hardware Implementation<text:bookmark-end text:name="__RefHeading___Toc1997_316657009"/></text:h>
      <text:p text:style-name="P75"><text:span text:style-name="T31">Note: </text:span><text:span text:style-name="T32">The ALP8B was designed in logic simulation software only (</text:span><text:a xlink:type="simple" xlink:href="https://github.com/hneemann/digital" text:style-name="Internet_20_link" text:visited-style-name="Visited_20_Internet_20_Link"><text:span text:style-name="T32">Digital by Hneemann</text:span></text:a><text:span text:style-name="T32">). As this </text:span><text:span text:style-name="T33">was</text:span><text:span text:style-name="T32"> a learning project, optimising for 74x chips and other </text:span><text:span text:style-name="T33">real world limitations and imperfections was not strictly considered.</text:span></text:p>
      <text:h text:style-name="P76" text:outline-level="2"><text:bookmark-start text:name="__RefHeading___Toc1999_316657009"/>System Microarchitecture &amp; Block Diagram<text:bookmark-end text:name="__RefHeading___Toc1999_316657009"/></text:h>
      <text:p text:style-name="P77">As seen in Figure <text:sequence-ref text:reference-format="value" text:ref-name="refFigure0">4.1</text:sequence-ref>, the ALP8B is a single bus, <text:span text:style-name="T34">9 register computer, with a dedicated 2-bit conditional flag register (FLGS). The four general purpose registers from the ISA can be seen labelled R0...R3, other registers include: Program Counter (PC) Instruction Register (IR), Memory Address Register (MAR), ALU temporary input (TMP), and ALU accumulator (ACC). The control unit (CU) represents the region that decodes instructions and controls the master clock.</text:span></text:p>
      <text:h text:style-name="Heading_20_3" text:outline-level="3"><text:bookmark-start text:name="__RefHeading___Toc2001_316657009"/><text:s/><text:span text:style-name="T34">Summary of Execution Cycle</text:span><text:bookmark-end text:name="__RefHeading___Toc2001_316657009"/></text:h>
      <text:p text:style-name="P78">The standard fetch-decode-execute path on the ALP8B is as follows. </text:p>
      <text:list text:style-name="L6">
        <text:list-item>
          <text:p text:style-name="P79">Fetch: The <text:span text:style-name="T35">CU sets the MUX to take the address input from the PC, enables output from the RAM, and enables write to IR. Then increments the PC using its internal half adder</text:span></text:p>
        </text:list-item>
        <text:list-item>
          <text:p text:style-name="P80">Decode/Execute: A microcode ROM is used to enable or disable required control signals. The microcode sequence is addressed by the time state and the top 4 bits of the instruction.</text:p>
        </text:list-item>
      </text:list>
      <text:p text:style-name="P81"/>
      <text:p text:style-name="P82"><draw:frame draw:style-name="fr1" draw:name="Frame1" text:anchor-type="char" svg:width="16.903cm" draw:z-index="0"><draw:text-box fo:min-height="10.421cm"><text:p text:style-name="Figure"><draw:frame draw:style-name="fr2" draw:name="Image1" text:anchor-type="paragraph" svg:width="16.903cm" style:rel-width="100%" svg:height="10.421cm" style:rel-height="scale" draw:z-index="1"><draw:image xlink:href="Pictures/1002AD7F00004E3D000030792384CD05.svg" xlink:type="simple" xlink:show="embed" xlink:actuate="onLoad" draw:mime-type="image/svg+xml"/><draw:image xlink:href="Pictures/10000001000002F5000001D57931B62E.png" xlink:type="simple" xlink:show="embed" xlink:actuate="onLoad" draw:mime-type="image/png"/></draw:frame>Figure <text:sequence text:ref-name="refFigure0" text:name="Figure" text:formula="ooow:Figure+1" style:num-format="1">4.1</text:sequence>: Block diagram of the ALP8B</text:p></draw:text-box></draw:frame></text:p>
      <text:h text:style-name="P83" text:outline-level="2"><text:bookmark-start text:name="__RefHeading___Toc2034_423618348"/><text:span text:style-name="T36">Control </text:span><text:span text:style-name="T37">U</text:span><text:span text:style-name="T36">nit</text:span><text:bookmark-end text:name="__RefHeading___Toc2034_423618348"/></text:h>
      <text:h text:style-name="P84" text:outline-level="3"><text:bookmark-start text:name="__RefHeading___Toc2003_316657009"/>Sequencer<text:bookmark-end text:name="__RefHeading___Toc2003_316657009"/></text:h>
      <text:p text:style-name="P85">The ALP8B is designed around a 6 stage instruction cycle. Time steps T0-T5 are generated through a counter. Early resetting of the counter is done synchronously, and is triggered by one of three signals; a microcode sequence early reset, hitting T6 (used as a loopback reset), or a NOP instruction. <text:span text:style-name="T38">Although instructions have the ability to use all steps from T2-T5, all instruction sequences currently only need up to T3 before calling a reset on the following step.</text:span></text:p>
      <text:p text:style-name="P85"/>
      <text:p text:style-name="P85">T0 and T1 are hardwired to handle the fetch cycle, with T0 handling instruction retrieval and <text:span text:style-name="T38">T1 sending a pulse to increment the PC. T0 and T1 are wired to a “FETCH” signal that disables all microcode ROM output until T2 onwards.</text:span></text:p>
      <text:p text:style-name="P86">T2-T5 are encoded into a 2-bit number and are fed into the address lines of the microcode ROM to index the sequence steps of a given instruction.</text:p>
      <text:p text:style-name="P86"><draw:frame draw:style-name="fr3" draw:name="Frame3" text:anchor-type="char" svg:x="3.087cm" svg:y="0cm" svg:width="9.67cm" draw:z-index="4"><draw:text-box fo:min-height="6.719cm"><text:p text:style-name="Figure"><draw:frame draw:style-name="fr4" draw:name="Image3" text:anchor-type="paragraph" svg:width="9.67cm" style:rel-width="100%" svg:height="6.719cm" style:rel-height="scale" draw:z-index="5"><draw:image xlink:href="Pictures/10000001000002C4000001ECA84F8B58.png" xlink:type="simple" xlink:show="embed" xlink:actuate="onLoad" draw:mime-type="image/png"/></draw:frame>Figure <text:sequence text:ref-name="refFigure1" text:name="Figure" text:formula="ooow:Figure+1" style:num-format="1">4.2</text:sequence>: Time state sequencer implementation in Digital</text:p></draw:text-box></draw:frame></text:p>
      <text:h text:style-name="P87" text:outline-level="3"><text:bookmark-start text:name="__RefHeading___Toc2005_316657009"/>Microcode ROM<text:bookmark-end text:name="__RefHeading___Toc2005_316657009"/></text:h>
      <text:p text:style-name="P88">Why Microcode?</text:p>
      <text:p text:style-name="P89">A hybrid microcode architecture for the control unit was chosen for a couple of reasons:</text:p>
      <text:list text:style-name="L7">
        <text:list-item>
          <text:p text:style-name="P90">Ease of bug fixing and simple reprogramming when control paths require changes</text:p>
        </text:list-item>
        <text:list-item>
          <text:p text:style-name="P90">Reducing visual logic gate clutter</text:p>
        </text:list-item>
        <text:list-item>
          <text:p text:style-name="P90">Desire to learn how a microcoded systems work on a fundamental level</text:p>
        </text:list-item>
      </text:list>
      <text:p text:style-name="P91">The microcode ROM is a 6-bit address and 8-bit data memory, resulting in a total of sixteen, four step microcode sequences.</text:p>
      <text:p text:style-name="P91"><text:soft-page-break/>Due to the 8-bit output, the control bits are decoded outside of the ROM, allowing for more control signals to be packed into 8 bits. The following table explains what each of the bits represent:</text:p>
      <table:table table:name="Table4" table:style-name="Table4" table:template-name="Default Style">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92">Bit <text:s/>7 </text:p>
          </table:table-cell>
          <table:table-cell table:style-name="Table4.A1" office:value-type="string">
            <text:p text:style-name="P92">Bit 6</text:p>
          </table:table-cell>
          <table:table-cell table:style-name="Table4.A1" office:value-type="string">
            <text:p text:style-name="P92">Bits 5-3</text:p>
          </table:table-cell>
          <table:table-cell table:style-name="Table4.A1" office:value-type="string">
            <text:p text:style-name="P92">Bit 2</text:p>
          </table:table-cell>
          <table:table-cell table:style-name="Table4.E1" office:value-type="string">
            <text:p text:style-name="P92">Bits 1-0</text:p>
          </table:table-cell>
        </table:table-row>
        <table:table-row>
          <table:table-cell table:style-name="Table4.A2" office:value-type="string">
            <text:p text:style-name="P92">VALID</text:p>
          </table:table-cell>
          <table:table-cell table:style-name="Table4.A2" office:value-type="string">
            <text:p text:style-name="P92">T_RESET</text:p>
          </table:table-cell>
          <table:table-cell table:style-name="Table4.A2" office:value-type="string">
            <text:p text:style-name="P92">DEST</text:p>
          </table:table-cell>
          <table:table-cell table:style-name="Table4.A2" office:value-type="string">
            <text:p text:style-name="P92">ADDRSEL / enFLGS</text:p>
          </table:table-cell>
          <table:table-cell table:style-name="Table4.E2" office:value-type="string">
            <text:p text:style-name="P92">SRC</text:p>
          </table:table-cell>
        </table:table-row>
      </table:table>
      <text:p text:style-name="P91"/>
      <text:p text:style-name="P91"><text:span text:style-name="T39">VALID: </text:span>All microcode sequence bytes must have this bit <text:span text:style-name="T40">HI</text:span>. <text:span text:style-name="T40">Microcode decoders are locked to only enable when T_RESET is LO and this bit is HI in order to prevent invalid control signals being sent during a sequence reset.</text:span></text:p>
      <text:p text:style-name="P93"><text:span text:style-name="T39">T_RESET: </text:span>Efficiency bit, HI to signal the early exit of a sequence.</text:p>
      <text:p text:style-name="P93"><text:span text:style-name="T39">DEST:</text:span> Destination location <text:span text:style-name="T41">(write enable control)</text:span>, 3-bit encoded signal, <text:span text:style-name="T41">control signal mapping below:</text:span></text:p>
      <table:table table:name="Table5" table:style-name="Table5" table:template-name="Default Style">
        <table:table-column table:style-name="Table5.A"/>
        <table:table-column table:style-name="Table5.B"/>
        <table:table-row>
          <table:table-cell table:style-name="Table5.A1" office:value-type="string">
            <text:p text:style-name="P94">000</text:p>
          </table:table-cell>
          <table:table-cell table:style-name="Table5.B1" office:value-type="string">
            <text:p text:style-name="P94">RA – IR bits used to determine which register</text:p>
          </table:table-cell>
        </table:table-row>
        <table:table-row>
          <table:table-cell table:style-name="Table5.A2" office:value-type="string">
            <text:p text:style-name="P94">001</text:p>
          </table:table-cell>
          <table:table-cell table:style-name="Table5.B2" office:value-type="string">
            <text:p text:style-name="P94">RB – IR bits used to determine which register</text:p>
          </table:table-cell>
        </table:table-row>
        <table:table-row>
          <table:table-cell table:style-name="Table5.A2" office:value-type="string">
            <text:p text:style-name="P94">010</text:p>
          </table:table-cell>
          <table:table-cell table:style-name="Table5.B2" office:value-type="string">
            <text:p text:style-name="P94">ACC – ALU accumulator only. Note: See ADDRESSEE / enFLGS below</text:p>
          </table:table-cell>
        </table:table-row>
        <table:table-row>
          <table:table-cell table:style-name="Table5.A2" office:value-type="string">
            <text:p text:style-name="P94">011</text:p>
          </table:table-cell>
          <table:table-cell table:style-name="Table5.B2" office:value-type="string">
            <text:p text:style-name="P94">FLGS – ALU flags only</text:p>
          </table:table-cell>
        </table:table-row>
        <table:table-row>
          <table:table-cell table:style-name="Table5.A2" office:value-type="string">
            <text:p text:style-name="P94">100</text:p>
          </table:table-cell>
          <table:table-cell table:style-name="Table5.B2" office:value-type="string">
            <text:p text:style-name="P94">TMP – ALU temporary</text:p>
          </table:table-cell>
        </table:table-row>
        <table:table-row>
          <table:table-cell table:style-name="Table5.A2" office:value-type="string">
            <text:p text:style-name="P94">101</text:p>
          </table:table-cell>
          <table:table-cell table:style-name="Table5.B2" office:value-type="string">
            <text:p text:style-name="P94">PC – <text:span text:style-name="T42">i</text:span>ncrement / enable jump</text:p>
          </table:table-cell>
        </table:table-row>
        <table:table-row>
          <table:table-cell table:style-name="Table5.A2" office:value-type="string">
            <text:p text:style-name="P94">110</text:p>
          </table:table-cell>
          <table:table-cell table:style-name="Table5.B2" office:value-type="string">
            <text:p text:style-name="P94">MAR – memory address register</text:p>
          </table:table-cell>
        </table:table-row>
        <table:table-row table:style-name="Table5.8">
          <table:table-cell table:style-name="Table5.A2" office:value-type="string">
            <text:p text:style-name="P94">111</text:p>
          </table:table-cell>
          <table:table-cell table:style-name="Table5.B2" office:value-type="string">
            <text:p text:style-name="P94">RAM – memory </text:p>
          </table:table-cell>
        </table:table-row>
      </table:table>
      <text:p text:style-name="P93"/>
      <text:p text:style-name="P95"><text:span text:style-name="T39">ADDRSEL / enFLGS:</text:span> This is a dual purpose bit, when HI, it sets the MUX in Figure <text:sequence-ref text:reference-format="value" text:ref-name="refFigure0">4.1</text:sequence-ref><text:s/>to use the MAR for indexing the memory. Simultaneously, when HI at the same time as DEST 010 (ACC), it allows both the FLGS and ACC registers to be write enabled at the same time, which is otherwise impossible with the decoder. This is used for instructions that need to save both their output and condition flag updates. <text:span text:style-name="T43">Due to the instruction set design, these two purposes are mutually exclusive.</text:span></text:p>
      <text:p text:style-name="P96">SRC: <text:span text:style-name="T44">Source location (output enable control), 2 bit encoded signal, mapping below:</text:span></text:p>
      <table:table table:name="Table6" table:style-name="Table6" table:template-name="Default Style">
        <table:table-column table:style-name="Table6.A"/>
        <table:table-column table:style-name="Table6.B"/>
        <table:table-row>
          <table:table-cell table:style-name="Table6.A1" office:value-type="string">
            <text:p text:style-name="P97">00</text:p>
          </table:table-cell>
          <table:table-cell table:style-name="Table6.B1" office:value-type="string">
            <text:p text:style-name="P97"><text:span text:style-name="T41">RA – IR bits used to determine which register</text:span> </text:p>
          </table:table-cell>
        </table:table-row>
        <table:table-row>
          <table:table-cell table:style-name="Table6.A2" office:value-type="string">
            <text:p text:style-name="P94">01</text:p>
          </table:table-cell>
          <table:table-cell table:style-name="Table6.B2" office:value-type="string">
            <text:p text:style-name="P94">RB – IR bits used to determine which register</text:p>
          </table:table-cell>
        </table:table-row>
        <table:table-row>
          <table:table-cell table:style-name="Table6.A2" office:value-type="string">
            <text:p text:style-name="P97">10</text:p>
          </table:table-cell>
          <table:table-cell table:style-name="Table6.B2" office:value-type="string">
            <text:p text:style-name="P97">ACC – ALU accumulator</text:p>
          </table:table-cell>
        </table:table-row>
        <table:table-row>
          <table:table-cell table:style-name="Table6.A2" office:value-type="string">
            <text:p text:style-name="P97">11</text:p>
          </table:table-cell>
          <table:table-cell table:style-name="Table6.B2" office:value-type="string">
            <text:p text:style-name="P97">RAM – memory </text:p>
          </table:table-cell>
        </table:table-row>
      </table:table>
      <text:h text:style-name="P98" text:outline-level="4" text:is-list-header="true"/>
      <text:h text:style-name="P99" text:outline-level="4"><text:bookmark-start text:name="__RefHeading___Toc2007_316657009"/>Microcode enabling<text:bookmark-end text:name="__RefHeading___Toc2007_316657009"/></text:h>
      <text:p text:style-name="P100">The microcode ROM decoders are only active if: the instruction is not in the “Housekeeping” op region (00 00 00 XY), the time state is not T0/T1, and there is currently no T_RESET active. <text:span text:style-name="T45">This is the “ROM ACTIVE MASK” section below.</text:span></text:p>
      <text:p text:style-name="P91"><draw:frame draw:style-name="fr5" draw:name="Frame4" text:anchor-type="char" svg:y="0cm" svg:width="11.707cm" draw:z-index="6"><draw:text-box fo:min-height="17.734cm"><text:p text:style-name="Figure"><draw:frame draw:style-name="fr4" draw:name="Image4" text:anchor-type="paragraph" svg:width="11.707cm" style:rel-width="100%" svg:height="15.177cm" style:rel-height="scale" draw:z-index="7"><draw:image xlink:href="Pictures/1000000100000399000004AA35CE530E.png" xlink:type="simple" xlink:show="embed" xlink:actuate="onLoad" draw:mime-type="image/png"/></draw:frame>Figure <text:sequence text:ref-name="refFigure2" text:name="Figure" text:formula="ooow:Figure+1" style:num-format="1">4.3</text:sequence>: Instruction control signal decoding in Digital via the microcode ROM</text:p></draw:text-box></draw:frame></text:p>
      <text:h text:style-name="P101" text:outline-level="4"><text:bookmark-start text:name="__RefHeading___Toc2009_316657009"/>Future Considerations<text:bookmark-end text:name="__RefHeading___Toc2009_316657009"/></text:h>
      <text:p text:style-name="P102">In hindsight, the<text:span text:style-name="T46"> </text:span>decoder activation <text:span text:style-name="T47">gates</text:span> could’ve been avoided entirely if the design of the microcode data word was done more carefully. Specifically, a much simpler system could’ve been made if empty bits in the microcode word did not map to valid control signals (i.e., zeros do not decode to a control signal). <text:span text:style-name="T47">See </text:span><text:span text:style-name="T47"><text:bookmark-ref text:reference-format="chapter" text:ref-name="__RefHeading___Toc1743_316657009">4.4</text:bookmark-ref></text:span><text:span text:style-name="T47">. </text:span></text:p>
      <text:h text:style-name="P103" text:outline-level="3"><text:bookmark-start text:name="__RefHeading___Toc2018_1996774639"/><text:soft-page-break/>Program Counter<text:bookmark-end text:name="__RefHeading___Toc2018_1996774639"/></text:h>
      <text:p text:style-name="P104">The program counter was designed with an internal half adder circuit, which allows for incrementing without using the dedicated ALU, saving clock cycles.</text:p>
      <text:p text:style-name="P104">The D flip flops used in the program counter as async reset master slave D flip flops. A pulse is sent to RST to clear the program counter from noise values and set to 0x<text:span text:style-name="T48">00</text:span> on start.</text:p>
      <text:p text:style-name="P105"><draw:frame draw:style-name="fr5" draw:name="Frame5" text:anchor-type="char" svg:y="0cm" svg:width="10.943cm" draw:z-index="8"><draw:text-box fo:min-height="9.142cm"><text:p text:style-name="Figure"><draw:frame draw:style-name="fr4" draw:name="Image5" text:anchor-type="paragraph" svg:width="10.943cm" style:rel-width="100%" svg:height="9.142cm" style:rel-height="scale" draw:z-index="9"><draw:image xlink:href="Pictures/10000001000003F70000035047D046E8.png" xlink:type="simple" xlink:show="embed" xlink:actuate="onLoad" draw:mime-type="image/png"/></draw:frame>Figure <text:sequence text:ref-name="refFigure3" text:name="Figure" text:formula="ooow:Figure+1" style:num-format="1">4.4</text:sequence>: Program counter implementation in Digital</text:p></draw:text-box></draw:frame>Two control signals are used to control incrementation / jumping. A normal Write Enable HI will simply feed in the incremented value, however, if WE is HI and JUMPSEL is HI, the D flip flops will read in the value from the data bus, which contains the jump address. <text:span text:style-name="T46">This is implemented in the control unit as seen below. Note as of writing, resetting the PC has not been implemented.</text:span></text:p>
      <text:p text:style-name="P105"><draw:frame draw:style-name="fr1" draw:name="Frame7" text:anchor-type="char" svg:width="16.254cm" draw:z-index="12"><draw:text-box fo:min-height="5.274cm"><text:p text:style-name="Figure"><draw:frame draw:style-name="fr4" draw:name="Image7" text:anchor-type="paragraph" svg:width="16.254cm" style:rel-width="100%" svg:height="5.274cm" style:rel-height="scale" draw:z-index="13"><draw:image xlink:href="Pictures/1000000100000552000001BA8E183157.png" xlink:type="simple" xlink:show="embed" xlink:actuate="onLoad" draw:mime-type="image/png"/></draw:frame>Figure <text:sequence text:ref-name="refFigure4" text:name="Figure" text:formula="ooow:Figure+1" style:num-format="1">4.5</text:sequence>: PC implementation in the control unit</text:p></draw:text-box></draw:frame></text:p>
      <text:h text:style-name="P106" text:outline-level="4"><text:bookmark-start text:name="__RefHeading___Toc2730_1996774639"/><text:soft-page-break/>Branching<text:bookmark-end text:name="__RefHeading___Toc2730_1996774639"/></text:h>
      <text:p text:style-name="P107">As seen above in Figure <text:sequence-ref text:reference-format="value" text:ref-name="refFigure4">4.5</text:sequence-ref>, the JUMPSEL pin is controlled by three signals, two that are rather trivial, INSTR_JUMP means we are in the opcode region for branching instructions, and PC_WE means that a write to the PC is to occur.</text:p>
      <text:p text:style-name="P108"><text:span text:style-name="T46">The third BRANCH_TAKEN signal, however, is utilised to determine whether a jump in the program counter is actually supposed to take place – this is used as all JUMP instructions use the same microcode sequence, therefore the logic to determine whether the carry flags are to cause a jump lives outside of the microcode entirely. </text:span><text:span text:style-name="T49">Bits 6 and 7 (to determine which </text:span><text:span text:style-name="T42">branch</text:span><text:span text:style-name="T49"> instruction), ZERO, and CARRY are used in a hardwired manner to determine if the branch is to be taken or not.</text:span><draw:frame draw:style-name="fr3" draw:name="Frame8" text:anchor-type="char" svg:x="2.441cm" svg:y="3.909cm" svg:width="10.848cm" draw:z-index="14"><draw:text-box fo:min-height="9.904cm"><text:p text:style-name="Figure"><draw:frame draw:style-name="fr4" draw:name="Image8" text:anchor-type="paragraph" svg:width="10.197cm" style:rel-width="94%" svg:height="9.308cm" style:rel-height="scale" draw:z-index="15"><draw:image xlink:href="Pictures/100000010000031A000002D5642E7D4B.png" xlink:type="simple" xlink:show="embed" xlink:actuate="onLoad" draw:mime-type="image/png"/></draw:frame>Figure <text:sequence text:ref-name="refFigure5" text:name="Figure" text:formula="ooow:Figure+1" style:num-format="1">4.6</text:sequence>: Hardwired branch enabler implementation </text:p></draw:text-box></draw:frame><text:span text:style-name="T49">The logic for th</text:span><text:span text:style-name="T50">e </text:span><text:span text:style-name="T49">BRANCH_TAKEN signal was synthesised via Digital’s truth table solver.</text:span></text:p>
      <text:p text:style-name="P108"/>
      <text:h text:style-name="P109" text:outline-level="3"/>
      <text:h text:style-name="P110" text:outline-level="3"><text:bookmark-start text:name="__RefHeading___Toc2542_4286045557"/>Hardwired “Housekeeping” Instructions<text:bookmark-end text:name="__RefHeading___Toc2542_4286045557"/></text:h>
      <text:p text:style-name="P111">As seen in the ISA, there are four instructions without operands. These instructions, dubbed the “Housekeeping” instructions, are hardwired and thus are not controlled via the microcode ROM. The simple implementation is that <text:span text:style-name="T51">when the top 6 bits of the instruction are 0, then disable microcode (</text:span><text:span text:style-name="T51"><text:bookmark-ref text:reference-format="number" text:ref-name="__RefHeading___Toc2007_316657009">4.2.2.1 </text:bookmark-ref></text:span><text:span text:style-name="T51">) and instead use the following implementation shown below.</text:span></text:p>
      <text:p text:style-name="P112"><draw:frame draw:style-name="fr1" draw:name="Frame10" text:anchor-type="char" svg:width="17cm" draw:z-index="18"><draw:text-box fo:min-height="6.724cm"><text:p text:style-name="Figure"><draw:frame draw:style-name="fr4" draw:name="Image10" text:anchor-type="paragraph" svg:width="17cm" style:rel-width="100%" svg:height="6.724cm" style:rel-height="scale" draw:z-index="19"><draw:image xlink:href="Pictures/100000010000049A000001D297B46102.png" xlink:type="simple" xlink:show="embed" xlink:actuate="onLoad" draw:mime-type="image/png"/></draw:frame>Figure <text:sequence text:ref-name="refFigure6" text:name="Figure" text:formula="ooow:Figure+1" style:num-format="1">4.7</text:sequence>: Housekeeping instructions hardwiring</text:p></draw:text-box></draw:frame><text:line-break/>Refer to Section <text:bookmark-ref text:reference-format="number" text:ref-name="__RefHeading___Toc2544_4286045557">4.4.1</text:bookmark-ref><text:s/>for understanding on how the 2-bit code for setting the flag register is handled.</text:p>
      <text:h text:style-name="P113" text:outline-level="2"><text:bookmark-start text:name="__RefHeading___Toc2011_316657009"/>Arithmetic Logic Unit (ALU)<text:bookmark-end text:name="__RefHeading___Toc2011_316657009"/></text:h>
      <text:p text:style-name="P114">The ALP8B has 11 instructions that are routed through the ALU for execution, 5 instructions that are single register (Format B), and 6 instructions that are dual register (Format C). Thus, a 4-bit ALU opcode is used to represent these instructions. ALU opcodes were, naively, added out of order as the ISA was expanded multiple times during development, this has led to a potentially suboptimal mapping of instruction opcode → ALU opcode. The mappings can be seen below. Note the use of ‘<text:span text:style-name="Source_20_Text">RR</text:span>’ to represent bits given to register <text:span text:style-name="T52">selection</text:span> (and thus ignored in mapping logic).</text:p>
      <text:p text:style-name="P114"/>
      <table:table table:name="Table2" table:style-name="Table2">
        <table:table-column table:style-name="Table2.A"/>
        <table:table-column table:style-name="Table2.B"/>
        <table:table-row table:style-name="Table2.1">
          <table:table-cell table:style-name="Table2.A1" office:value-type="string">
            <text:p text:style-name="P115"/>
            <table:table table:name="Table1" table:style-name="Table1" table:template-name="Default Style">
              <table:table-column table:style-name="Table1.A"/>
              <table:table-column table:style-name="Table1.B"/>
              <table:table-column table:style-name="Table1.C"/>
              <table:table-row>
                <table:table-cell table:style-name="Table1.A1" table:number-columns-spanned="3" office:value-type="string">
                  <text:p text:style-name="P116">Single register operations <text:span text:style-name="T53">(Format B)</text:span></text:p>
                </table:table-cell>
                <table:covered-table-cell/>
                <table:covered-table-cell/>
              </table:table-row>
              <table:table-row table:style-name="Table1.2">
                <table:table-cell table:style-name="Table1.A2" office:value-type="string">
                  <text:p text:style-name="P116">Mnemonic</text:p>
                </table:table-cell>
                <table:table-cell table:style-name="Table1.A2" office:value-type="string">
                  <text:p text:style-name="P116">Opcode (8b)</text:p>
                </table:table-cell>
                <table:table-cell table:style-name="Table1.C2" office:value-type="string">
                  <text:p text:style-name="P116">ALU-op (4b)</text:p>
                </table:table-cell>
              </table:table-row>
              <table:table-row table:style-name="Table1.3">
                <table:table-cell table:style-name="Table1.A2" office:value-type="string">
                  <text:p text:style-name="P116"><text:span text:style-name="Source_20_Text">SHL</text:span></text:p>
                </table:table-cell>
                <table:table-cell table:style-name="Table1.A2" office:value-type="string">
                  <text:p text:style-name="P117"><text:span text:style-name="Source_20_Text"><text:span text:style-name="T52">0000 01RR</text:span></text:span></text:p>
                </table:table-cell>
                <table:table-cell table:style-name="Table1.C2" office:value-type="string">
                  <text:p text:style-name="P117"><text:span text:style-name="Source_20_Text"><text:span text:style-name="T52">0000</text:span></text:span></text:p>
                </table:table-cell>
              </table:table-row>
              <table:table-row>
                <table:table-cell table:style-name="Table1.A2" office:value-type="string">
                  <text:p text:style-name="P117"><text:span text:style-name="Source_20_Text"><text:span text:style-name="T52">SHR</text:span></text:span></text:p>
                </table:table-cell>
                <table:table-cell table:style-name="Table1.A2" office:value-type="string">
                  <text:p text:style-name="P117"><text:span text:style-name="Source_20_Text"><text:span text:style-name="T52">0000 10RR</text:span></text:span></text:p>
                </table:table-cell>
                <table:table-cell table:style-name="Table1.C2" office:value-type="string">
                  <text:p text:style-name="P117"><text:span text:style-name="Source_20_Text"><text:span text:style-name="T52">0001</text:span></text:span></text:p>
                </table:table-cell>
              </table:table-row>
              <table:table-row>
                <table:table-cell table:style-name="Table1.A2" office:value-type="string">
                  <text:p text:style-name="P117"><text:span text:style-name="Source_20_Text"><text:span text:style-name="T52">NOT</text:span></text:span></text:p>
                </table:table-cell>
                <table:table-cell table:style-name="Table1.A2" office:value-type="string">
                  <text:p text:style-name="P117"><text:span text:style-name="Source_20_Text"><text:span text:style-name="T52">0000 11RR</text:span></text:span></text:p>
                </table:table-cell>
                <table:table-cell table:style-name="Table1.C2" office:value-type="string">
                  <text:p text:style-name="P117"><text:span text:style-name="Source_20_Text"><text:span text:style-name="T52">0010</text:span></text:span></text:p>
                </table:table-cell>
              </table:table-row>
              <table:table-row>
                <table:table-cell table:style-name="Table1.A2" office:value-type="string">
                  <text:p text:style-name="P117"><text:span text:style-name="Source_20_Text"><text:span text:style-name="T52">INC</text:span></text:span></text:p>
                </table:table-cell>
                <table:table-cell table:style-name="Table1.A2" office:value-type="string">
                  <text:p text:style-name="P117"><text:span text:style-name="Source_20_Text"><text:span text:style-name="T52">0001 00RR</text:span></text:span></text:p>
                </table:table-cell>
                <table:table-cell table:style-name="Table1.C2" office:value-type="string">
                  <text:p text:style-name="P117"><text:span text:style-name="Source_20_Text"><text:span text:style-name="T52">0011</text:span></text:span></text:p>
                </table:table-cell>
              </table:table-row>
              <table:table-row table:style-name="Table1.2">
                <table:table-cell table:style-name="Table1.A2" office:value-type="string">
                  <text:p text:style-name="P117"><text:span text:style-name="Source_20_Text"><text:span text:style-name="T52">DEC</text:span></text:span></text:p>
                </table:table-cell>
                <table:table-cell table:style-name="Table1.A2" office:value-type="string">
                  <text:p text:style-name="P117"><text:span text:style-name="Source_20_Text"><text:span text:style-name="T52">0001 01RR</text:span></text:span></text:p>
                </table:table-cell>
                <table:table-cell table:style-name="Table1.C2" office:value-type="string">
                  <text:p text:style-name="P117"><text:span text:style-name="Source_20_Text"><text:span text:style-name="T52">0111</text:span></text:span></text:p>
                </table:table-cell>
              </table:table-row>
            </table:table>
            <text:p text:style-name="P118"/>
          </table:table-cell>
          <table:table-cell table:style-name="Table2.B1" office:value-type="string">
            <text:p text:style-name="P118"/>
            <table:table table:name="Table3" table:style-name="Table3" table:template-name="Default Style">
              <table:table-column table:style-name="Table3.A"/>
              <table:table-column table:style-name="Table3.B"/>
              <table:table-column table:style-name="Table3.C"/>
              <table:table-row>
                <table:table-cell table:style-name="Table3.A1" table:number-columns-spanned="3" office:value-type="string">
                  <text:p text:style-name="P116">Dual register operations <text:span text:style-name="T53">(Format C)</text:span></text:p>
                </table:table-cell>
                <table:covered-table-cell/>
                <table:covered-table-cell/>
              </table:table-row>
              <table:table-row table:style-name="Table3.2">
                <table:table-cell table:style-name="Table3.A2" office:value-type="string">
                  <text:p text:style-name="P116">Mnemonic</text:p>
                </table:table-cell>
                <table:table-cell table:style-name="Table3.A2" office:value-type="string">
                  <text:p text:style-name="P116">Opcode (8b)</text:p>
                </table:table-cell>
                <table:table-cell table:style-name="Table3.C2" office:value-type="string">
                  <text:p text:style-name="P116">ALU-op (4b)</text:p>
                </table:table-cell>
              </table:table-row>
              <table:table-row table:style-name="Table3.3">
                <table:table-cell table:style-name="Table3.A2" office:value-type="string">
                  <text:p text:style-name="P116"><text:span text:style-name="Source_20_Text">ADC</text:span></text:p>
                </table:table-cell>
                <table:table-cell table:style-name="Table3.A2" office:value-type="string">
                  <text:p text:style-name="P117"><text:span text:style-name="Source_20_Text"><text:span text:style-name="T52">1000 RRRR</text:span></text:span></text:p>
                </table:table-cell>
                <table:table-cell table:style-name="Table3.C2" office:value-type="string">
                  <text:p text:style-name="P117"><text:span text:style-name="Source_20_Text"><text:span text:style-name="T52">1000</text:span></text:span></text:p>
                </table:table-cell>
              </table:table-row>
              <table:table-row>
                <table:table-cell table:style-name="Table3.A2" office:value-type="string">
                  <text:p text:style-name="P117"><text:span text:style-name="Source_20_Text"><text:span text:style-name="T52">ORR</text:span></text:span></text:p>
                </table:table-cell>
                <table:table-cell table:style-name="Table3.A2" office:value-type="string">
                  <text:p text:style-name="P117"><text:span text:style-name="Source_20_Text"><text:span text:style-name="T52">1001 RRRR</text:span></text:span></text:p>
                </table:table-cell>
                <table:table-cell table:style-name="Table3.C2" office:value-type="string">
                  <text:p text:style-name="P117"><text:span text:style-name="Source_20_Text"><text:span text:style-name="T52">1001</text:span></text:span></text:p>
                </table:table-cell>
              </table:table-row>
              <table:table-row>
                <table:table-cell table:style-name="Table3.A2" office:value-type="string">
                  <text:p text:style-name="P117"><text:span text:style-name="Source_20_Text"><text:span text:style-name="T52">AND</text:span></text:span></text:p>
                </table:table-cell>
                <table:table-cell table:style-name="Table3.A2" office:value-type="string">
                  <text:p text:style-name="P117"><text:span text:style-name="Source_20_Text"><text:span text:style-name="T52">1010 RRRR</text:span></text:span></text:p>
                </table:table-cell>
                <table:table-cell table:style-name="Table3.C2" office:value-type="string">
                  <text:p text:style-name="P117"><text:span text:style-name="Source_20_Text"><text:span text:style-name="T52">1010</text:span></text:span></text:p>
                </table:table-cell>
              </table:table-row>
              <table:table-row>
                <table:table-cell table:style-name="Table3.A2" office:value-type="string">
                  <text:p text:style-name="P117"><text:span text:style-name="Source_20_Text"><text:span text:style-name="T52">XOR</text:span></text:span></text:p>
                </table:table-cell>
                <table:table-cell table:style-name="Table3.A2" office:value-type="string">
                  <text:p text:style-name="P117"><text:span text:style-name="Source_20_Text"><text:span text:style-name="T52">1011 RRRR</text:span></text:span></text:p>
                </table:table-cell>
                <table:table-cell table:style-name="Table3.C2" office:value-type="string">
                  <text:p text:style-name="P117"><text:span text:style-name="Source_20_Text"><text:span text:style-name="T52">1011</text:span></text:span></text:p>
                </table:table-cell>
              </table:table-row>
              <table:table-row table:style-name="Table3.2">
                <table:table-cell table:style-name="Table3.A2" office:value-type="string">
                  <text:p text:style-name="P117"><text:span text:style-name="Source_20_Text"><text:span text:style-name="T52">CMP</text:span></text:span></text:p>
                </table:table-cell>
                <table:table-cell table:style-name="Table3.A2" office:value-type="string">
                  <text:p text:style-name="P117"><text:span text:style-name="Source_20_Text"><text:span text:style-name="T52">0010 RRRR</text:span></text:span></text:p>
                </table:table-cell>
                <table:table-cell table:style-name="Table3.C2" office:value-type="string">
                  <text:p text:style-name="P117"><text:span text:style-name="Source_20_Text"><text:span text:style-name="T52">0100</text:span></text:span></text:p>
                </table:table-cell>
              </table:table-row>
              <table:table-row table:style-name="Table3.2">
                <table:table-cell table:style-name="Table3.A2" office:value-type="string">
                  <text:p text:style-name="P116"><text:span text:style-name="Source_20_Text">SUB</text:span></text:p>
                </table:table-cell>
                <table:table-cell table:style-name="Table3.A2" office:value-type="string">
                  <text:p text:style-name="P117"><text:span text:style-name="Source_20_Text"><text:span text:style-name="T52">0011 RRRR</text:span></text:span></text:p>
                </table:table-cell>
                <table:table-cell table:style-name="Table3.C2" office:value-type="string">
                  <text:p text:style-name="P117"><text:span text:style-name="Source_20_Text"><text:span text:style-name="T52">0101</text:span></text:span></text:p>
                </table:table-cell>
              </table:table-row>
            </table:table>
            <text:p text:style-name="P119"/>
          </table:table-cell>
        </table:table-row>
      </table:table>
      <text:p text:style-name="Table">Table <text:sequence text:ref-name="refTable0" text:name="Table" text:formula="ooow:Table+1" style:num-format="1">1</text:sequence>: Instruction to ALU opcode mappings</text:p>
      <text:p text:style-name="Table"/>
      <text:p text:style-name="P115">As a split between ALU instructions between two opcode regions was required in the ISA to fit all instructions, the mapping stage is done in two stages, one for each opcode region. This means that regions 00 and 10 are mapped simultaneously to their correct op code instruction, and only enabled to travel to the ALU when the instruction type is either in region 00 or 10. <text:span text:style-name="T54">During instructions that a</text:span><draw:frame draw:style-name="fr6" draw:name="Frame2" text:anchor-type="char" svg:x="-0.002cm" svg:y="2.787cm" svg:width="10.135cm" draw:z-index="2"><draw:text-box fo:min-height="7.772cm"><text:p text:style-name="Figure"><draw:frame draw:style-name="fr4" draw:name="Image2" text:anchor-type="paragraph" svg:width="10.135cm" style:rel-width="100%" svg:height="5.973cm" style:rel-height="scale" draw:z-index="3"><draw:image xlink:href="Pictures/10000001000004F7000002ED53770307.png" xlink:type="simple" xlink:show="embed" xlink:actuate="onLoad" draw:mime-type="image/png"/></draw:frame>Figure <text:sequence text:ref-name="refFigure7" text:name="Figure" text:formula="ooow:Figure+1" style:num-format="1">4.8</text:sequence><text:s/><text:span text:style-name="T54">ALU-op mapping implementation in Digital.</text:span></text:p></draw:text-box></draw:frame><text:span text:style-name="T54">re in other regions, the ALU receives code 0000, although it does not matter as no register will be listening.</text:span></text:p>
      <text:p text:style-name="P120">Note: As per <text:bookmark-ref text:reference-format="chapter" text:ref-name="__RefHeading___Toc2034_423618348">4.2</text:bookmark-ref>, the microcode is not active during housekeeping instructions, so they cannot conflict with ALU operations <text:span text:style-name="T43">or ALU-op mapping</text:span></text:p>
      <text:p text:style-name="P121"/>
      <text:h text:style-name="P122" text:outline-level="2"><text:bookmark-start text:name="__RefHeading___Toc1743_316657009"/>Register File<text:bookmark-end text:name="__RefHeading___Toc1743_316657009"/></text:h>
      <text:p text:style-name="P123">Due to the ALP8B only having four general purpose registers, with a single special register for the condition flags. <text:span text:style-name="T55">The bottom 4 bits in the IR are used to decode RA/RB, with additional AND gating from the microcode for activation. The flags register is enabled directly through microcode (</text:span><text:span text:style-name="T46">as </text:span><text:span text:style-name="T55">seen in </text:span><text:span text:style-name="T46">Figure</text:span><text:span text:style-name="T55"> </text:span><text:span text:style-name="T55"><text:sequence-ref text:reference-format="value" text:ref-name="refFigure2">4.3</text:sequence-ref></text:span><text:span text:style-name="T46">)</text:span></text:p>
      <text:p text:style-name="P124">RA Output enable (RAOE) is gated with AND NOT PCWE. This is because a single PC increment - a microcode with a destination, but no source due to the internal adder used for the PC – defaults to using RA as source (as RA source is ‘00’). Thus, a simple AND gate is used to ensure that a microcode sequence to increase the program counter by one does not unintentionally enable the output of RA. Ultimately, this is the consequence of poor multi-word instruction planning.</text:p>
      <text:p text:style-name="P123"/>
      <text:p text:style-name="P125"><draw:frame draw:style-name="fr7" draw:name="Frame6" text:anchor-type="char" svg:width="17cm" draw:z-index="10"><draw:text-box fo:min-height="8.467cm"><text:p text:style-name="Figure"><draw:frame draw:style-name="fr4" draw:name="Image6" text:anchor-type="paragraph" svg:width="17cm" style:rel-width="100%" svg:height="8.467cm" style:rel-height="scale" draw:z-index="11"><draw:image xlink:href="Pictures/100000010000051100000286FDA98988.png" xlink:type="simple" xlink:show="embed" xlink:actuate="onLoad" draw:mime-type="image/png"/></draw:frame>Figure <text:sequence text:ref-name="refFigure8" text:name="Figure" text:formula="ooow:Figure+1" style:num-format="1">4.9</text:sequence>: GPR selection inside the control unit</text:p></draw:text-box></draw:frame></text:p>
      <text:h text:style-name="P126" text:outline-level="3"/>
      <text:h text:style-name="P127" text:outline-level="3"><text:bookmark-start text:name="__RefHeading___Toc2544_4286045557"/>Flags Register<text:bookmark-end text:name="__RefHeading___Toc2544_4286045557"/></text:h>
      <text:p text:style-name="P128">The Flags register is designed as a separate two flip flop register. The register has two inputs, Write Enable Z (WE_Z), which functions as a typical write enable, and Write Enable C (WE_C). WE_C is special in that it is a two bit write enable which drives a multiplexer to select a given C value.</text:p>
      <table:table table:name="Table10" table:style-name="Table10" table:template-name="Default Style">
        <table:table-column table:style-name="Table10.A"/>
        <table:table-column table:style-name="Table10.B"/>
        <table:table-row>
          <table:table-cell table:style-name="Table10.A1" office:value-type="string">
            <text:p text:style-name="P129">WE_C Bits [1:0]</text:p>
          </table:table-cell>
          <table:table-cell table:style-name="Table10.B1" office:value-type="string">
            <text:p text:style-name="P129">Outcome</text:p>
          </table:table-cell>
        </table:table-row>
        <table:table-row>
          <table:table-cell table:style-name="Table10.A2" office:value-type="string">
            <text:p text:style-name="P129"><text:span text:style-name="Source_20_Text">00</text:span></text:p>
          </table:table-cell>
          <table:table-cell table:style-name="Table10.B2" office:value-type="string">
            <text:p text:style-name="P129">Preserve previous value</text:p>
          </table:table-cell>
        </table:table-row>
        <table:table-row>
          <table:table-cell table:style-name="Table10.A2" office:value-type="string">
            <text:p text:style-name="P129"><text:span text:style-name="Source_20_Text">01</text:span></text:p>
          </table:table-cell>
          <table:table-cell table:style-name="Table10.B2" office:value-type="string">
            <text:p text:style-name="P129">Overwrite current with ALU output</text:p>
          </table:table-cell>
        </table:table-row>
        <table:table-row>
          <table:table-cell table:style-name="Table10.A2" office:value-type="string">
            <text:p text:style-name="P129"><text:span text:style-name="Source_20_Text">10</text:span></text:p>
          </table:table-cell>
          <table:table-cell table:style-name="Table10.B2" office:value-type="string">
            <text:p text:style-name="P129">Overwrite current with 0</text:p>
          </table:table-cell>
        </table:table-row>
        <table:table-row>
          <table:table-cell table:style-name="Table10.A2" office:value-type="string">
            <text:p text:style-name="P129"><text:span text:style-name="Source_20_Text">11</text:span></text:p>
          </table:table-cell>
          <table:table-cell table:style-name="Table10.B2" office:value-type="string">
            <text:p text:style-name="P129">Overwrite current with 1</text:p>
          </table:table-cell>
        </table:table-row>
      </table:table>
      <text:p text:style-name="P128"/>
      <text:p text:style-name="P112"><draw:frame draw:style-name="fr8" draw:name="Frame9" text:anchor-type="char" svg:y="2.143cm" svg:width="9.151cm" draw:z-index="16"><draw:text-box fo:min-height="10.811cm"><text:p text:style-name="Figure"><draw:frame draw:style-name="fr4" draw:name="Image9" text:anchor-type="paragraph" svg:width="9.151cm" style:rel-width="100%" svg:height="10.811cm" style:rel-height="scale" draw:z-index="17"><draw:image xlink:href="Pictures/10000001000002F900000383ABD29334.png" xlink:type="simple" xlink:show="embed" xlink:actuate="onLoad" draw:mime-type="image/png"/></draw:frame>Figure <text:sequence text:ref-name="refFigure9" text:name="Figure" text:formula="ooow:Figure+1" style:num-format="1">4.10</text:sequence>: Flags Register</text:p></draw:text-box></draw:frame>The implementation of the flags register in digital can be seen below. A reset component (the box with the R at the bottom) is used to initialise the flip flop to 0 at simulation start, such that the user does not have to waste a byte of memory clearing the flags on program start</text:p>
      <text:h text:style-name="P130" text:outline-level="1"><text:bookmark-start text:name="__RefHeading___Toc2732_1996774639"/>Software<text:bookmark-end text:name="__RefHeading___Toc2732_1996774639"/></text:h>
      <text:h text:style-name="P131" text:outline-level="2"><text:bookmark-start text:name="__RefHeading___Toc2145_4286045557"/>Microcode <text:span text:style-name="T56">Programming</text:span><text:bookmark-end text:name="__RefHeading___Toc2145_4286045557"/></text:h>
      <text:p text:style-name="P132">The microcode sequences <text:span text:style-name="T56">were programmed via a python script to simplify the process. The finalised output is an Intel HEX file that is read by Digital as the microcode ROM’s data. </text:span><text:span text:style-name="T57">A s</text:span><text:span text:style-name="T56">nippet can be seen below.</text:span></text:p>
      <text:p text:style-name="P133"><text:span text:style-name="T58">r</text:span><text:span text:style-name="T59">om </text:span><text:span text:style-name="T60">=</text:span><text:span text:style-name="T59"> [</text:span><text:span text:style-name="T60">0</text:span><text:span text:style-name="T59">] </text:span><text:span text:style-name="T60">*</text:span><text:span text:style-name="T59"> </text:span><text:span text:style-name="T60">64</text:span></text:p>
      <text:p text:style-name="P134"/>
      <text:p text:style-name="P135"><text:span text:style-name="T61">def</text:span><text:span text:style-name="T62"> </text:span><text:span text:style-name="T63">ucode</text:span><text:span text:style-name="T64">(opcode, t_state, control_word):</text:span></text:p>
      <text:p text:style-name="P135"><text:span text:style-name="T64"><text:s text:c="4"/><text:tab/></text:span><text:span text:style-name="T65"># address = (OPC shifted left 2 bits) OR (T-state)</text:span></text:p>
      <text:p text:style-name="P135"><text:span text:style-name="T64"><text:tab/>address </text:span><text:span text:style-name="T66">=</text:span><text:span text:style-name="T64"> (opcode </text:span><text:span text:style-name="T66">&lt;&lt;</text:span><text:span text:style-name="T64"> </text:span><text:span text:style-name="T66">2</text:span><text:span text:style-name="T64">) </text:span><text:span text:style-name="T66">|</text:span><text:span text:style-name="T64"> t_state </text:span></text:p>
      <text:p text:style-name="P136"/>
      <text:p text:style-name="P135"><text:span text:style-name="T64"><text:tab/></text:span><text:span text:style-name="T65"># sore the word in the final rom , make sure it has the validity bit</text:span></text:p>
      <text:p text:style-name="P135"><text:span text:style-name="T64"><text:tab/>rom[address] </text:span><text:span text:style-name="T66">=</text:span><text:span text:style-name="T64"> control_word </text:span><text:span text:style-name="T66">|</text:span><text:span text:style-name="T64"> VALID_INSTR</text:span></text:p>
      <text:p text:style-name="P137"><text:span text:style-name="T64"/></text:p>
      <text:p text:style-name="P138"># OPC_LOAD <text:span text:style-name="T67"/></text:p>
      <text:p text:style-name="P139"><text:span text:style-name="T64">ucode(OPC_LDM, T2, DST_MAR </text:span><text:span text:style-name="T66">|</text:span><text:span text:style-name="T64"> SC_RB) </text:span><text:span text:style-name="T65"># load address value from B into MAR</text:span></text:p>
      <text:p text:style-name="P139"><text:span text:style-name="T64">ucode(OPC_LDM, T3, ADDR_SEL_CFLGS </text:span><text:span text:style-name="T66">|</text:span><text:span text:style-name="T64"> DST_RA </text:span><text:span text:style-name="T66">|</text:span><text:span text:style-name="T64"> SC_RAM) </text:span><text:span text:style-name="T65"># use MAR address to load RAM value into RA</text:span></text:p>
      <text:p text:style-name="P140">ucode(OPC_LDM, T4, T_RESET)</text:p>
      <text:p text:style-name="P140"/>
      <text:p text:style-name="P141"># ... other sequences</text:p>
      <text:h text:style-name="P142" text:outline-level="2"><text:bookmark-start text:name="__RefHeading___Toc2147_4286045557"/>Assembler<text:bookmark-end text:name="__RefHeading___Toc2147_4286045557"/></text:h>
      <text:p text:style-name="P143">A bare-bones, two <text:span text:style-name="T68">pass</text:span> assembler was also created in python to compile the assembly to machine code. The assembler has support for:</text:p>
      <text:list text:style-name="L8">
        <text:list-item>
          <text:p text:style-name="P144">Labels, for assembly code organisation.</text:p>
        </text:list-item>
        <text:list-item>
          <text:p text:style-name="P144">Comments.</text:p>
        </text:list-item>
        <text:list-item>
          <text:p text:style-name="P144">An ‘<text:span text:style-name="Source_20_Text">INI</text:span>’ pseudo-instruction to initialise <text:span text:style-name="T68">any memory location to a given initial value.</text:span></text:p>
        </text:list-item>
      </text:list>
      <text:p text:style-name="P145">The assembler outputs to Intel HEX (for the Digital Simulator), and also to a line by line hex / binary debug file.</text:p>
      <text:h text:style-name="P146" text:outline-level="1"><text:bookmark-start text:name="__RefHeading___Toc2394_2056641800"/>Learnings &amp; <text:span text:style-name="T28">Next steps</text:span><text:bookmark-end text:name="__RefHeading___Toc2394_2056641800"/></text:h>
      <text:p text:style-name="P147">Similarly as to what was mentioned previously in the ISA section, much of this project was not designed with future expandability in mind. <text:span text:style-name="T28">There were also a plethora of poor design choices, both in the hardware (simulation) and in the ISA that had cascading consequences throughout the project. A majority of this can be attributed to naivety, however, had greater care been taken in the planning phase, these poor choices could’ve been minimised. Much of this project was also based off problem solving these poor choices - and hence creating new problems along the way – utilising a greater amount of computer architecture theory would’ve helped supplement good design decisions more often.</text:span></text:p>
      <text:p text:style-name="P147"/>
      <text:p text:style-name="P148">Ideally, future development would consist of a full ground up redesign, taking into account the learnings from this project. Version 2 would ideally consist of the following changes/additions:</text:p>
      <text:list text:style-name="L9">
        <text:list-item>
          <text:p text:style-name="P149">Larger memory space (16-bit addressed).</text:p>
        </text:list-item>
        <text:list-item>
          <text:p text:style-name="P149">Hardware stack.</text:p>
        </text:list-item>
        <text:list-item>
          <text:p text:style-name="P149">Memory mapped I/O.</text:p>
        </text:list-item>
        <text:list-item>
          <text:p text:style-name="P149">Greater range of instructions: Immediates, math without carry, signed/unsigned flags.</text:p>
        </text:list-item>
        <text:list-item>
          <text:p text:style-name="P149">Complex branching: program counter relative jumps, RISC-style comparison within the branch instruction.</text:p>
        </text:list-item>
        <text:list-item>
          <text:p text:style-name="P150">Larger register file.</text:p>
        </text:list-item>
        <text:list-item>
          <text:p text:style-name="P150">Greater adherence to orthogonality within the ISA.</text:p>
        </text:list-item>
        <text:list-item>
          <text:p text:style-name="P151">Increased variety of testing</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 text:name="PageNumWizard_FOOTER_Default Page Style1"/><text:page-number text:select-page="current">3</text:page-number></text:p>
      </style:footer>
      <style:footer-left>
        <text:p text:style-name="MP1"><text:bookmark-start text:name="PageNumWizard_FOOTER_Default Page Style2"/><text:page-number text:select-page="current">20</text:page-number><text:bookmark-end text:name="PageNumWizard_FOOTER_Default Page Style2"/></text:p>
      </style:footer-left>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8T13:19:07.013032609</meta:creation-date>
    <meta:generator>LibreOffice/26.2.4.2$Linux_X86_64 LibreOffice_project/64a984c51f4702dbd3710b13428c673a2f1292e7</meta:generator>
    <dc:date>2026-07-23T00:20:59.945692462</dc:date>
    <meta:editing-duration>PT17H9M5S</meta:editing-duration>
    <meta:editing-cycles>38</meta:editing-cycles>
    <meta:print-date>2026-07-19T22:32:14.924148895</meta:print-date>
    <meta:printed-by>PDF files</meta:printed-by>
    <meta:document-statistic meta:table-count="10" meta:image-count="10" meta:object-count="0" meta:page-count="20" meta:paragraph-count="486" meta:word-count="3729" meta:character-count="20866" meta:non-whitespace-character-count="17627"/>
  </office:meta>
</office:document-meta>
</file>